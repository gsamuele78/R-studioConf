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Preformatted_20_Text">
      <style:paragraph-properties fo:margin-top="0in" fo:margin-bottom="0.1965in" style:contextual-spacing="false"/>
    </style:style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l four audits are complete. Here is the consolidated analysis of the T1 host deployment layer, followed by the roadmap.</text:p>
      <text:p text:style-name="Horizontal_20_Line"/>
      <text:h text:style-name="Heading_20_1" text:outline-level="1">T1 Host Deployment — Deep Audit Report</text:h>
      <text:p text:style-name="Text_20_body"><text:span text:style-name="Strong_20_Emphasis">TL;DR:</text:span> The core engineering is better than the paperwork around it. <text:span text:style-name="Source_20_Text">50_setup_nodes.sh</text:span>, the <text:span text:style-name="Source_20_Text">Rprofile_site.d/</text:span> fragment system, and the Rprofile CHANGELOG discipline are genuinely strong. But the project's front door (README) describes a repo that no longer exists, CI tests a deleted layout with <text:span text:style-name="Source_20_Text">|| true</text:span> masking everything, the shared library has a <text:span text:style-name="Strong_20_Emphasis">rollback function that is a silent no-op</text:span>, 8 privileged scripts run with strict mode commented out, a public GitHub repo leaks a complete spear-phishing kit against <text:span text:style-name="Source_20_Text">unibo.it</text:span>, and ~26 orphaned template files (~1.6 MB) bury the 30 that actually matter. Total: <text:span text:style-name="Strong_20_Emphasis">4 CRITICAL, ~19 HIGH, ~21 MEDIUM</text:span> findings.</text:p>
      <text:h text:style-name="Heading_20_2" text:outline-level="2">1. Critical defects (silent-failure class — worst under your own pessimistic ethos)</text:h>
      <text:list text:style-name="L1">
        <text:list-item>
          <text:p text:style-name="P1"><text:span text:style-name="Strong_20_Emphasis"><text:span text:style-name="Source_20_Text">lib/common_utils.sh:591-624</text:span></text:span><text:span text:style-name="Strong_20_Emphasis"> — </text:span><text:span text:style-name="Strong_20_Emphasis"><text:span text:style-name="Source_20_Text">restore_config()</text:span></text:span><text:span text:style-name="Strong_20_Emphasis"> is a no-op that reports success.</text:span> It prompts, logs "Restoring…", logs "restored", restarts sssd/rstudio/nginx — and never copies a single file back (<text:span text:style-name="Source_20_Text">_restore_item</text:span> at :562 is dead code). An operator rolling back a botched deploy gets services restarted over broken configs and a green message. </text:p>
        </text:list-item>
        <text:list-item>
          <text:p text:style-name="P1"><text:span text:style-name="Strong_20_Emphasis"><text:span text:style-name="Source_20_Text">r_env_manager.sh:1042-1078</text:span></text:span><text:span text:style-name="Strong_20_Emphasis"> — menu option 10 (Uninstall) crashes on arrival.</text:span> <text:span text:style-name="Source_20_Text">INSTALLED_CRAN_PACKAGES</text:span>, <text:span text:style-name="Source_20_Text">INSTALLED_GITHUB_PACKAGES</text:span>, <text:span text:style-name="Source_20_Text">R_ENV_STATE_FILE</text:span> are never defined anywhere; under <text:span text:style-name="Source_20_Text">set -u</text:span> the function aborts at the first expansion. </text:p>
        </text:list-item>
        <text:list-item>
          <text:p text:style-name="P1"><text:span text:style-name="Strong_20_Emphasis">AD backend XOR not enforced.</text:span> The skill mandates SSSD XOR Samba per host, but neither <text:span text:style-name="Source_20_Text">10_join_domain_sssd.sh</text:span> nor <text:span text:style-name="Source_20_Text">11_join_domain_samba.sh</text:span> checks for the other backend before converting the NSS/PAM stack. Running both leaves a half-converted auth stack. </text:p>
        </text:list-item>
        <text:list-item>
          <text:p text:style-name="P2"><text:span text:style-name="Strong_20_Emphasis"><text:span text:style-name="Source_20_Text">lib/common_utils.sh:270-272</text:span></text:span><text:span text:style-name="Strong_20_Emphasis"> — apt failures converted to success.</text:span> <text:span text:style-name="Source_20_Text">if ! run_command …; then return $?; fi</text:span> returns the status of the <text:span text:style-name="Emphasis">negated condition</text:span> (0). A failed <text:span text:style-name="Source_20_Text">apt-get install</text:span> propagates as success to <text:span text:style-name="Source_20_Text">set -e</text:span> callers. Related: every <text:span text:style-name="Source_20_Text">run_command</text:span> exit path does a bare <text:span text:style-name="Source_20_Text">set +o pipefail</text:span>, permanently stripping pipefail from the calling script — the library defeats HC-03 for everyone who uses it. </text:p>
        </text:list-item>
      </text:list>
      <text:h text:style-name="Heading_20_2" text:outline-level="2">2. Security &amp; privacy (public repo)</text:h>
      <text:p text:style-name="Text_20_body">No credentials are committed anywhere — good. But the combination of committed data is a complete reconnaissance kit:</text:p>
      <text:list text:style-name="L2">
        <text:list-item>
          <text:p text:style-name="P3"><text:span text:style-name="Source_20_Text">config/scopri_progetti_known.conf:9-19</text:span> — <text:span text:style-name="Strong_20_Emphasis">7+ real researcher usernames mapped to supervisors and funded projects</text:span> (third-party PII). </text:p>
        </text:list-item>
        <text:list-item>
          <text:p text:style-name="P3"><text:span text:style-name="Source_20_Text">config/admin_recipients.txt</text:span> — 10 real PI emails (commented but readable), the <text:span text:style-name="Strong_20_Emphasis">production IP </text:span><text:span text:style-name="Strong_20_Emphasis"><text:span text:style-name="Source_20_Text">137.204.21.170</text:span></text:span>, internal Teams group. </text:p>
        </text:list-item>
        <text:list-item>
          <text:p text:style-name="P3"><text:soft-page-break/><text:span text:style-name="Source_20_Text">config/lib_kerberos_setup.vars.conf</text:span> — real AD realm, admin UPN, OU paths, <text:span text:style-name="Strong_20_Emphasis">the exact security groups whose members get shell access</text:span>, and all DC/KDC hostnames. </text:p>
        </text:list-item>
        <text:list-item>
          <text:p text:style-name="P3">Hardcoded in executables: operator's own AD username in <text:span text:style-name="Source_20_Text">test_rstudio_login.sh:6</text:span>, <text:span text:style-name="Source_20_Text">@unibo.it</text:span> in <text:span text:style-name="Source_20_Text">ttyd_login_wrapper.sh:40</text:span>, and <text:span text:style-name="Source_20_Text">test_rstudio_login.sh</text:span> puts the password in curl's argv 7 times (visible in <text:span text:style-name="Source_20_Text">ps</text:span>, HC-04 spirit violation). </text:p>
        </text:list-item>
        <text:list-item>
          <text:p text:style-name="P3"><text:span text:style-name="Strong_20_Emphasis">HC-15 violation:</text:span> Google Fonts CDN calls in <text:span text:style-name="Source_20_Text">portal_index.html.template:10</text:span>, <text:span text:style-name="Source_20_Text">portal_index_simple.html.template:8</text:span>, <text:span text:style-name="Source_20_Text">server_status_wrapper.html.template:9</text:span> (mirrored in T2 — fix T1 first per rule 3). </text:p>
        </text:list-item>
        <text:list-item>
          <text:p text:style-name="P4">World-writable artifacts on a multi-user host: <text:span text:style-name="Source_20_Text">chmod 666</text:span> log file (<text:span text:style-name="Source_20_Text">50_setup_nodes.sh:1627</text:span>), <text:span text:style-name="Source_20_Text">chmod 777</text:span> notifications dir (<text:span text:style-name="Source_20_Text">:2116</text:span>) — symlink/log-forgery vectors; use group+setgid instead. </text:p>
        </text:list-item>
      </text:list>
      <text:p text:style-name="Text_20_body">The PII files should become <text:span text:style-name="Source_20_Text">.gitignore</text:span>'d site-local overrides with committed placeholder examples (the same treatment you already give <text:span text:style-name="Source_20_Text">.env</text:span>), and the history purged with <text:span text:style-name="Source_20_Text">git filter-repo</text:span>/BFG.</text:p>
      <text:h text:style-name="Heading_20_2" text:outline-level="2">3. Scripts (<text:span text:style-name="Source_20_Text">scripts/</text:span>, <text:span text:style-name="Source_20_Text">init.sh</text:span>, <text:span text:style-name="Source_20_Text">r_env_manager.sh</text:span>)</text:h>
      <text:list text:style-name="L3">
        <text:list-item>
          <text:p text:style-name="P5"><text:span text:style-name="Strong_20_Emphasis">8 scripts have </text:span><text:span text:style-name="Strong_20_Emphasis"><text:span text:style-name="Source_20_Text">set -euo pipefail</text:span></text:span><text:span text:style-name="Strong_20_Emphasis"> commented out</text:span> (<text:span text:style-name="Source_20_Text">12_</text:span>, <text:span text:style-name="Source_20_Text">15_</text:span>, <text:span text:style-name="Source_20_Text">20_configure_rstudio.sh</text:span> — 665 privileged lines, <text:span text:style-name="Source_20_Text">31_setup_web_portal.sh</text:span>, <text:span text:style-name="Source_20_Text">99_verify_domain_join.sh</text:span>, <text:span text:style-name="Source_20_Text">test_rstudio_login.sh</text:span>, <text:span text:style-name="Source_20_Text">ttyd_login_wr­apper.sh</text:span>). HC-03 violation on exactly the scripts doing <text:span text:style-name="Source_20_Text">sed -i</text:span>/<text:span text:style-name="Source_20_Text">chown</text:span> on <text:span text:style-name="Source_20_Text">/etc</text:span>. </text:p>
        </text:list-item>
        <text:list-item>
          <text:p text:style-name="P5"><text:span text:style-name="Strong_20_Emphasis">6 required scripts are not executable</text:span> (<text:span text:style-name="Source_20_Text">git ls-files -s</text:span> = 100644): <text:span text:style-name="Source_20_Text">15_setup_nginx_cleanup.sh</text:span>, <text:span text:style-name="Source_20_Text">40_install_telemetry.sh</text:span>, three <text:span text:style-name="Source_20_Text">99_*</text:span>, <text:span text:style-name="Source_20_Text">pin_r_version.sh</text:span>. The launcher only lists <text:span text:style-name="Source_20_Text">-executable</text:span> files, so <text:span text:style-name="Source_20_Text">15_</text:span> and <text:span text:style-name="Source_20_Text">40_</text:span> are <text:span text:style-name="Strong_20_Emphasis">invisible in the menu</text:span>. <text:span text:style-name="Source_20_Text">init.sh</text:span> papers over it with a chmod loop, but only if you enter through <text:span text:style-name="Source_20_Text">init.sh</text:span>. </text:p>
        </text:list-item>
        <text:list-item>
          <text:p text:style-name="P5"><text:span text:style-name="Strong_20_Emphasis">Duplicate </text:span><text:span text:style-name="Strong_20_Emphasis"><text:span text:style-name="Source_20_Text">31_</text:span></text:span><text:span text:style-name="Strong_20_Emphasis"> prefix</text:span> (<text:span text:style-name="Source_20_Text">31_optimize_system.sh</text:span> and <text:span text:style-name="Source_20_Text">31_setup_web_portal.sh</text:span>; the latter's header self-identifies as <text:span text:style-name="Source_20_Text">09_web_portal_setup.sh</text:span>). Filesystem-arbitrary ordering in the launcher. </text:p>
        </text:list-item>
        <text:list-item>
          <text:p text:style-name="P5"><text:span text:style-name="Strong_20_Emphasis">HC-12 violation:</text:span> <text:span text:style-name="Source_20_Text">50_setup_nodes.sh:1571-1572</text:span> edits <text:span text:style-name="Source_20_Text">rstudio-prefs.json</text:span> with <text:span text:style-name="Source_20_Text">sed</text:span> instead of <text:span text:style-name="Source_20_Text">jq</text:span> (rule #16). <text:span text:style-name="Source_20_Text">jq</text:span> is already a dependency. </text:p>
        </text:list-item>
        <text:list-item>
          <text:p text:style-name="P5"><text:span text:style-name="Strong_20_Emphasis">SSOT version drift:</text:span> <text:span text:style-name="Source_20_Text">r_env_manager.sh:196,620</text:span> hardcode <text:span text:style-name="Source_20_Text">RSTUDIO_VERSION_FALLBACK="2023.06.0"</text:span> vs canonical <text:span text:style-name="Source_20_Text">2026.01.1+403</text:span>; <text:span text:style-name="Source_20_Text">pin_r_version.sh:42</text:span> re-hardcodes <text:span text:style-name="Source_20_Text">4.6.0</text:span>. Rule 19. </text:p>
        </text:list-item>
        <text:list-item>
          <text:p text:style-name="P5"><text:span text:style-name="Source_20_Text">init.sh</text:span> itself violates HC-03 (no strict mode, no chmod guard). <text:span text:style-name="Source_20_Text">r_env_manager.sh</text:span>: non-atomic <text:span text:style-name="Source_20_Text">acquire_lock</text:span> (TOCTOU, no stale-PID recovery), dead commented block at :1113-1151, off-by-one menu range text. </text:p>
        </text:list-item>
        <text:list-item>
          <text:p text:style-name="P6"><text:span text:style-name="Source_20_Text">13_harden_pam_password.sh</text:span> and <text:span text:style-name="Source_20_Text">fix_pam_segfault_inplace.sh</text:span> are ~90% duplicate one-incident scripts that bypass <text:span text:style-name="Source_20_Text">common_utils.sh</text:span> with their own logging. </text:p>
        </text:list-item>
      </text:list>
      <text:h text:style-name="Heading_20_2" text:outline-level="2"><text:soft-page-break/>4. Lib &amp; templates</text:h>
      <text:list text:style-name="L4">
        <text:list-item>
          <text:p text:style-name="P7">The <text:span text:style-name="Source_20_Text">process_template</text:span>/<text:span text:style-name="Source_20_Text">process_systemd_template</text:span> pair: two divergent sed-based engines, one of which (<text:span text:style-name="Source_20_Text">systemd</text:span>) does unescaped <text:span text:style-name="Source_20_Text">${!var}</text:span> interpolation (injection/corruption risk). Both should collapse into one bash-native <text:span text:style-name="Source_20_Text">${content//…/…}</text:span> replacement — newline-safe and injection-safe. </text:p>
        </text:list-item>
        <text:list-item>
          <text:p text:style-name="P7"><text:span text:style-name="Strong_20_Emphasis">26 orphaned template files (~1.6 MB):</text:span> 8 versioned Rprofile copies, <text:span text:style-name="Strong_20_Emphasis">two different files both claiming v11.3</text:span> (inconsistent naming, divergent content), all of <text:span text:style-name="Source_20_Text">templates/old/</text:span> (16 files), a file literally named <text:span text:style-name="Source_20_Text">cleanup_r_orphans.sh copy.template</text:span> that is one revision stale and would <text:span text:style-name="Strong_20_Emphasis">kill legitimate PSOCK workers</text:span> if ever deployed. </text:p>
        </text:list-item>
        <text:list-item>
          <text:p text:style-name="P7"><text:span text:style-name="Strong_20_Emphasis">Dead </text:span><text:span text:style-name="Strong_20_Emphasis"><text:span text:style-name="Source_20_Text">Renviron.template</text:span></text:span><text:span text:style-name="Strong_20_Emphasis"> holds the </text:span><text:span text:style-name="Strong_20_Emphasis"><text:span text:style-name="Emphasis">newest</text:span></text:span><text:span text:style-name="Strong_20_Emphasis"> engineering decision</text:span> (KERAS_HOME on NFS, not local) that the live heredoc generator at <text:span text:style-name="Source_20_Text">50_setup_nodes.sh:1170</text:span> contradicts. Port the decision into the live path before archiving. </text:p>
        </text:list-item>
        <text:list-item>
          <text:p text:style-name="P8">Good news: <text:span text:style-name="Source_20_Text">/Rtmp</text:span> and BLAS-serial invariants pass cleanly everywhere; <text:span text:style-name="Source_20_Text">lib/biome-portal.js</text:span> is correctly wired (not orphaned); the 14 <text:span text:style-name="Source_20_Text">Rprofile_site.d/</text:span> fragments follow the documented ordering and are deploy-validated. </text:p>
        </text:list-item>
      </text:list>
      <text:h text:style-name="Heading_20_2" text:outline-level="2">5. Documentation drift</text:h>
      <text:list text:style-name="L5">
        <text:list-item>
          <text:p text:style-name="P9"><text:span text:style-name="Strong_20_Emphasis">Root </text:span><text:span text:style-name="Strong_20_Emphasis"><text:span text:style-name="Source_20_Text">README.md</text:span></text:span><text:span text:style-name="Strong_20_Emphasis"> is WRONG</text:span> — describes a <text:span text:style-name="Source_20_Text">setup_r_env.sh</text:span> + <text:span text:style-name="Source_20_Text">install/</text:span> layout, <text:span text:style-name="Source_20_Text">/var/log/r_setup/</text:span> logs, <text:span text:style-name="Source_20_Text">:8787</text:span> access, none of which exist. Anyone landing on the repo is misled from line 1. </text:p>
        </text:list-item>
        <text:list-item>
          <text:p text:style-name="P9"><text:span text:style-name="Strong_20_Emphasis"><text:span text:style-name="Source_20_Text">.github/workflows/test_setup_r_env.yml</text:span></text:span><text:span text:style-name="Strong_20_Emphasis"> tests that ghost layout</text:span> with <text:span text:style-name="Source_20_Text">|| true</text:span> everywhere → permanent false green. </text:p>
        </text:list-item>
        <text:list-item>
          <text:p text:style-name="P9"><text:span text:style-name="Strong_20_Emphasis"><text:span text:style-name="Source_20_Text">.ai/agents.md §5</text:span></text:span><text:span text:style-name="Strong_20_Emphasis"> is stale</text:span> — missing 10+ scripts, 3 wrong descriptions — and it feeds those wrong descriptions to every AI agent that touches the repo. </text:p>
        </text:list-item>
        <text:list-item>
          <text:p text:style-name="P9">Reference docs lag: SCRIPT_CATALOG/CONFIGURATION_MAP/DIAGNOSTICS_INDEX miss <text:span text:style-name="Source_20_Text">pin_r_version.*</text:span>, all of <text:span text:style-name="Source_20_Text">scripts/tools/</text:span> (8 files), and 3 diagnostics; CONFIGURATION_MAP still says RPROFILE_VERSION 12.4 (actual 12.10). </text:p>
        </text:list-item>
        <text:list-item>
          <text:p text:style-name="P9"><text:span text:style-name="Strong_20_Emphasis">No repo-level CHANGELOG</text:span> — only the (exemplary, <text:span text:style-name="Source_20_Text">make doc-coherence</text:span>-enforced) <text:span text:style-name="Source_20_Text">Rprofile_site.CHANGELOG.md</text:span>. <text:span text:style-name="Source_20_Text">r_env_manager.sh</text:span> claims "v2.0.0" with zero history. </text:p>
        </text:list-item>
        <text:list-item>
          <text:p text:style-name="P10">Accurate and worth preserving as the model: <text:span text:style-name="Source_20_Text">INSTALLATION_GUIDE.md</text:span>, the <text:span text:style-name="Source_20_Text">Makefile</text:span> audit gate, and rule-18 version↔changelog coupling. </text:p>
        </text:list-item>
      </text:list>
      <text:p text:style-name="Horizontal_20_Line"/>
      <text:h text:style-name="Heading_20_1" text:outline-level="1">Proposed Roadmap</text:h>
      <text:p text:style-name="Text_20_body">Sequenced as you asked — documentation/changelog/README first, then correctness, then hygiene, then features. Each phase is independently shippable.</text:p>
      <text:p text:style-name="Text_20_body"><text:span text:style-name="Strong_20_Emphasis">Phase 0 — Stop the bleeding (docs front door + false-green CI)</text:span></text:p>
      <text:list text:style-name="L6">
        <text:list-item>
          <text:p text:style-name="P11"><text:soft-page-break/>Rewrite root <text:span text:style-name="Source_20_Text">README.md</text:span> as a thin accurate landing page → point to <text:span text:style-name="Source_20_Text">docs/README.md</text:span> + <text:span text:style-name="Source_20_Text">INSTALLATION_GUIDE.md</text:span>. </text:p>
        </text:list-item>
        <text:list-item>
          <text:p text:style-name="P11">Fix or delete <text:span text:style-name="Source_20_Text">.github/workflows/test_setup_r_env.yml</text:span> (remove <text:span text:style-name="Source_20_Text">|| true</text:span> masking; test real entrypoints). </text:p>
        </text:list-item>
        <text:list-item>
          <text:p text:style-name="P11">Introduce a repo-root <text:span text:style-name="Source_20_Text">CHANGELOG.md</text:span> (Keep-a-Changelog) and seed it from script headers; add an <text:span text:style-name="Source_20_Text">[Unreleased]</text:span> section. </text:p>
        </text:list-item>
        <text:list-item>
          <text:p text:style-name="P12">Re-sync <text:span text:style-name="Source_20_Text">.ai/agents.md §5</text:span> and the corrupted <text:span text:style-name="Source_20_Text">.agents/skills/host-install-audit/SKILL.md</text:span> (the "R/RStudio Version Alignment" block is duplicated ~8×). </text:p>
        </text:list-item>
      </text:list>
      <text:p text:style-name="Text_20_body"><text:span text:style-name="Strong_20_Emphasis">Phase 1 — CRITICAL correctness</text:span></text:p>
      <text:list text:style-name="L7">
        <text:list-item>
          <text:p text:style-name="P13">Implement (or hard-fail) <text:span text:style-name="Source_20_Text">restore_config()</text:span>. </text:p>
        </text:list-item>
        <text:list-item>
          <text:p text:style-name="P13">Fix the <text:span text:style-name="Source_20_Text">return $?</text:span> apt-masking bug and the pipefail-stripping in <text:span text:style-name="Source_20_Text">run_command</text:span>. </text:p>
        </text:list-item>
        <text:list-item>
          <text:p text:style-name="P13">Define the uninstall state vars / guard them so menu option 10 works. </text:p>
        </text:list-item>
        <text:list-item>
          <text:p text:style-name="P14">Add the AD-backend XOR precondition to both join scripts. </text:p>
        </text:list-item>
      </text:list>
      <text:p text:style-name="Text_20_body"><text:span text:style-name="Strong_20_Emphasis">Phase 2 — HIGH hygiene</text:span></text:p>
      <text:list text:style-name="L8">
        <text:list-item>
          <text:p text:style-name="P15">Uncomment <text:span text:style-name="Source_20_Text">set -euo pipefail</text:span> in the 8 scripts; audit <text:span text:style-name="Source_20_Text">20_configure_rstudio.sh</text:span>'s <text:span text:style-name="Source_20_Text">sed -i</text:span> calls. </text:p>
        </text:list-item>
        <text:list-item>
          <text:p text:style-name="P15"><text:span text:style-name="Source_20_Text">chmod +x</text:span> + commit the 6 scripts; resolve the duplicate <text:span text:style-name="Source_20_Text">31_</text:span> numbering. </text:p>
        </text:list-item>
        <text:list-item>
          <text:p text:style-name="P15">Remove hardcoded <text:span text:style-name="Source_20_Text">2023.06.0</text:span>/<text:span text:style-name="Source_20_Text">4.6.0</text:span>; source from SSOT. </text:p>
        </text:list-item>
        <text:list-item>
          <text:p text:style-name="P15"><text:span text:style-name="Source_20_Text">init.sh</text:span>: strict mode + chmod guard. </text:p>
        </text:list-item>
        <text:list-item>
          <text:p text:style-name="P16">Replace <text:span text:style-name="Source_20_Text">sed</text:span> JSON edits in <text:span text:style-name="Source_20_Text">50_setup_nodes.sh</text:span> with <text:span text:style-name="Source_20_Text">jq</text:span>. </text:p>
        </text:list-item>
      </text:list>
      <text:p text:style-name="Text_20_body"><text:span text:style-name="Strong_20_Emphasis">Phase 3 — Security/privacy</text:span></text:p>
      <text:list text:style-name="L9">
        <text:list-item>
          <text:p text:style-name="P17">Convert PII configs to placeholder + <text:span text:style-name="Source_20_Text">.gitignore</text:span>'d site overrides; purge history. </text:p>
        </text:list-item>
        <text:list-item>
          <text:p text:style-name="P17">Self-host portal fonts (HC-15), T1 then T2. </text:p>
        </text:list-item>
        <text:list-item>
          <text:p text:style-name="P18">Tighten 666/777 to group+setgid; de-hardcode operator username/domain. </text:p>
        </text:list-item>
      </text:list>
      <text:p text:style-name="Text_20_body"><text:span text:style-name="Strong_20_Emphasis">Phase 4 — Template &amp; doc consolidation</text:span></text:p>
      <text:list text:style-name="L10">
        <text:list-item>
          <text:p text:style-name="P19">Port the KERAS/NFS decision into the live generator, then move 26 orphaned templates to <text:span text:style-name="Source_20_Text">archive/</text:span> with a lineage README. </text:p>
        </text:list-item>
        <text:list-item>
          <text:p text:style-name="P19">Collapse the two templating engines into one. </text:p>
        </text:list-item>
        <text:list-item>
          <text:p text:style-name="P20">Refresh SCRIPT_CATALOG/CONFIGURATION_MAP/DIAGNOSTICS_INDEX; extend <text:span text:style-name="Source_20_Text">make doc-coherence</text:span> to also pin the CONFIGURATION_MAP version string. </text:p>
        </text:list-item>
      </text:list>
      <text:p text:style-name="Text_20_body"><text:span text:style-name="Strong_20_Emphasis">Phase 5 — Operability features</text:span></text:p>
      <text:list text:style-name="L11">
        <text:list-item>
          <text:p text:style-name="P21">Uniform <text:span text:style-name="Source_20_Text">--help</text:span>/<text:span text:style-name="Source_20_Text">-y</text:span>/<text:span text:style-name="Source_20_Text">--dry-run</text:span> across numbered scripts (model on <text:span text:style-name="Source_20_Text">50_setup_nodes.sh</text:span> and <text:span text:style-name="Source_20_Text">31_optimize_system.sh</text:span>). </text:p>
        </text:list-item>
        <text:list-item>
          <text:p text:style-name="P21"><text:span text:style-name="Source_20_Text">flock</text:span>-based locking with stale-PID recovery in <text:span text:style-name="Source_20_Text">r_env_manager.sh</text:span>. </text:p>
        </text:list-item>
        <text:list-item>
          <text:p text:style-name="P22">De-duplicate the PAM scripts and the <text:span text:style-name="Source_20_Text">resolve_*</text:span> email helpers. </text:p>
        </text:list-item>
      </text:list>
      <text:p text:style-name="Horizontal_20_Line"/>
      <text:p text:style-name="Text_20_body">These were read-only audits — I have not modified anything. Since you framed this as analysis + roadmap, I've stopped here rather than starting changes.</text:p>
      <text:p text:style-name="Text_20_body"><text:soft-page-break/>Two things I'd recommend deciding before any work begins:</text:p>
      <text:list text:style-name="L12">
        <text:list-item>
          <text:p text:style-name="P23"><text:span text:style-name="Strong_20_Emphasis">The security/PII findings (Phase 3) are the most time-sensitive</text:span> because the repo is public <text:span text:style-name="Emphasis">now</text:span>. History rewriting (<text:span text:style-name="Source_20_Text">git filter-repo</text:span>) is disruptive to anyone with clones and is irreversible — that's your call to make, not mine to assume. </text:p>
        </text:list-item>
        <text:list-item>
          <text:p text:style-name="P24"><text:span text:style-name="Strong_20_Emphasis">Where should this report live?</text:span> I can commit it as <text:span text:style-name="Source_20_Text">docs/audits/T1_HOST_AUDIT_2026-06.md</text:span> plus a seeded root <text:span text:style-name="Source_20_Text">CHANGELOG.md</text:span> on <text:span text:style-name="Source_20_Text">claude/peaceful-curie-l3w3es</text:span> and open a draft PR, which makes Phase 0 concrete and reviewable. </text:p>
        </text:list-item>
      </text:list>
      <text:p text:style-name="Text_20_body">Want me to start with Phase 0 (write the audit doc, new README, CHANGELOG, and fix the skill file), or would you prefer I tackle the Phase 1 critical code fixes first?</text:p>
      <text:p text:style-name="Standard">---------------</text:p>
      <text:p text:style-name="Text_20_body">Good question — the answer is: <text:span text:style-name="Strong_20_Emphasis">you edit the real data exactly once, move it to a file git never sees, and the scripts pick it up automatically forever after.</text:span> No re-editing on every pull. It's the exact same pattern the project already uses for <text:span text:style-name="Source_20_Text">.env</text:span> (rule 12: never committed, yet the live stack works). Here's the concrete mechanism:</text:p>
      <text:h text:style-name="Heading_20_2" text:outline-level="2">The overlay pattern</text:h>
      <text:p text:style-name="Text_20_body"><text:span text:style-name="Strong_20_Emphasis">1. Repo keeps a sanitized base + example files (committed):</text:span></text:p>
      <text:p text:style-name="Preformatted_20_Text"><text:span text:style-name="Source_20_Text">config/</text:span></text:p>
      <text:p text:style-name="Preformatted_20_Text"><text:span text:style-name="Source_20_Text">├── lib_kerberos_setup.vars.conf <text:s text:c="7"/># committed: placeholders + key docs</text:span></text:p>
      <text:p text:style-name="Preformatted_20_Text"><text:span text:style-name="Source_20_Text">├── admin_recipients.txt.example <text:s text:c="7"/># committed: format example, fake data</text:span></text:p>
      <text:p text:style-name="Preformatted_20_Text"><text:span text:style-name="Source_20_Text">├── user_email_map.txt.example <text:s text:c="9"/># committed</text:span></text:p>
      <text:p text:style-name="Preformatted_20_Text"><text:span text:style-name="Source_20_Text">├── scopri_progetti_known.conf.example <text:s/># committed</text:span></text:p>
      <text:p text:style-name="Preformatted_20_Text"><text:span text:style-name="Source_20_Text">└── site/ <text:s text:c="30"/># .gitignore'd — NEVER committed</text:span></text:p>
      <text:p text:style-name="Preformatted_20_Text"><text:span text:style-name="Source_20_Text"><text:s text:c="4"/>├── lib_kerberos_setup.local.conf <text:s text:c="2"/># real realm, OUs, groups, KDCs</text:span></text:p>
      <text:p text:style-name="Preformatted_20_Text"><text:span text:style-name="Source_20_Text"><text:s text:c="4"/>├── admin_recipients.txt <text:s text:c="11"/># real emails + IP</text:span></text:p>
      <text:p text:style-name="Preformatted_20_Text"><text:span text:style-name="Source_20_Text"><text:s text:c="4"/>├── user_email_map.txt</text:span></text:p>
      <text:p text:style-name="P25"><text:span text:style-name="Source_20_Text"><text:s text:c="4"/>└── scopri_progetti_known.conf</text:span></text:p>
      <text:p text:style-name="Text_20_body"><text:span text:style-name="Strong_20_Emphasis">2. Scripts source the base, then the local override if present:</text:span></text:p>
      <text:p text:style-name="Preformatted_20_Text"><text:span text:style-name="Source_20_Text">source "${CONFIG_DIR}/lib_kerberos_setup.vars.conf" <text:s text:c="9"/># placeholders/defaults</text:span></text:p>
      <text:p text:style-name="Preformatted_20_Text"><text:span text:style-name="Source_20_Text">[[ -f "${CONFIG_DIR}/site/lib_kerberos_setup.local.conf" ]] &amp;&amp; \</text:span></text:p>
      <text:p text:style-name="P25"><text:span text:style-name="Source_20_Text"><text:s text:c="4"/>source "${CONFIG_DIR}/site/lib_kerberos_setup.local.conf" <text:s/># real values win</text:span></text:p>
      <text:p text:style-name="Text_20_body">This is a ~3-line change per consuming script (or one helper in <text:span text:style-name="Source_20_Text">lib/common_utils.sh</text:span>). For the data files (<text:span text:style-name="Source_20_Text">admin_recipients.txt</text:span> etc.), the scripts already read them via a path variable — that path just resolves to <text:span text:style-name="Source_20_Text">config/site/</text:span> first, falling back to the <text:span text:style-name="Source_20_Text">.example</text:span> with a loud warning.</text:p>
      <text:h text:style-name="Heading_20_2" text:outline-level="2">Why this works for live code</text:h>
      <text:list text:style-name="L13">
        <text:list-item>
          <text:p text:style-name="P26"><text:span text:style-name="Strong_20_Emphasis">The live host is T1-authoritative anyway.</text:span> The real data lives on the server, where it's needed. <text:span text:style-name="Source_20_Text">git pull</text:span> updates the code and never touches <text:span text:style-name="Source_20_Text">config/site/</text:span> — your real values survive every update untouched. </text:p>
        </text:list-item>
        <text:list-item>
          <text:p text:style-name="P26"><text:span text:style-name="Strong_20_Emphasis">One-time migration:</text:span> <text:span text:style-name="Source_20_Text">mv</text:span> the 4 real files into <text:span text:style-name="Source_20_Text">config/site/</text:span>, add <text:span text:style-name="Source_20_Text">config/site/</text:span> to <text:span text:style-name="Source_20_Text">.gitignore</text:span>, done. You never type that data again. </text:p>
        </text:list-item>
        <text:list-item>
          <text:p text:style-name="P27"><text:soft-page-break/><text:span text:style-name="Strong_20_Emphasis">Fail-pessimistic:</text:span> if <text:span text:style-name="Source_20_Text">site/</text:span> is missing (fresh clone), scripts hit placeholders and abort with "site config not found — copy the .example files" instead of half-joining a domain with fake values. That's <text:span text:style-name="Emphasis">more</text:span> in line with your ethos than today, where a fresh clone silently carries someone else's production values. </text:p>
        </text:list-item>
      </text:list>
      <text:h text:style-name="Heading_20_2" text:outline-level="2">Backup / disaster recovery for the site files</text:h>
      <text:p text:style-name="Text_20_body">Since git no longer carries them, pick one:</text:p>
      <text:list text:style-name="L14">
        <text:list-item>
          <text:p text:style-name="P28"><text:span text:style-name="Strong_20_Emphasis">Simplest (recommended for a single sysadmin):</text:span> include <text:span text:style-name="Source_20_Text">config/site/</text:span> in your existing backup path (<text:span text:style-name="Source_20_Text">/var/backups/r_env_manager/</text:span> is already there) — it's 4 small text files. </text:p>
        </text:list-item>
        <text:list-item>
          <text:p text:style-name="P28"><text:span text:style-name="Strong_20_Emphasis">If you want versioning:</text:span> a tiny <text:span text:style-name="Emphasis">private</text:span> GitHub repo containing only the <text:span text:style-name="Source_20_Text">site/</text:span> overlay, cloned into <text:span text:style-name="Source_20_Text">config/site/</text:span> on the host. Public repo = code, private repo = your data. </text:p>
        </text:list-item>
        <text:list-item>
          <text:p text:style-name="P29"><text:span text:style-name="Strong_20_Emphasis">If you want them in </text:span><text:span text:style-name="Strong_20_Emphasis"><text:span text:style-name="Emphasis">this</text:span></text:span><text:span text:style-name="Strong_20_Emphasis"> repo encrypted:</text:span> <text:span text:style-name="Source_20_Text">git-crypt</text:span> or <text:span text:style-name="Source_20_Text">sops</text:span> — works, but adds key-management overhead I wouldn't recommend for 4 files and one operator. </text:p>
        </text:list-item>
      </text:list>
      <text:h text:style-name="Heading_20_2" text:outline-level="2">One honest caveat</text:h>
      <text:p text:style-name="Text_20_body">The data is already public in the git history today — moving the files only stops <text:span text:style-name="Emphasis">future</text:span> exposure. Purging history (<text:span text:style-name="Source_20_Text">git filter-repo</text:span>) is worth doing but the realistic assumption is it's been crawled. The practical mitigations are the ones above plus awareness (the PI email list and the user→project map are the spear-phishing assets; the AD/KDC names were partially discoverable via DNS anyway).</text:p>
      <text:p text:style-name="Text_20_body">Want me to implement this? Concretely: create <text:span text:style-name="Source_20_Text">config/site/</text:span> + <text:span text:style-name="Source_20_Text">.gitignore</text:span> entry, generate the sanitized base/<text:span text:style-name="Source_20_Text">.example</text:span> files from the current ones (so your real data is preserved in <text:span text:style-name="Source_20_Text">site/</text:span> on your host — in the repo I'd commit only the sanitized versions), and patch the consuming scripts (<text:span text:style-name="Source_20_Text">12_lib_kerberos_setup.sh</text:span>, <text:span text:style-name="Source_20_Text">50_setup_nodes.sh</text:span>, <text:span text:style-name="Source_20_Text">lib/common_utils.sh</text:span>, etc.) with the override loader. Your live host would need one <text:span text:style-name="Source_20_Text">mv</text:span> of the real files into <text:span text:style-name="Source_20_Text">config/site/</text:span> at deploy time, and nothing else ever agai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0T17:02:16.664497753</meta:creation-date>
    <dc:date>2026-06-10T17:03:18.688322948</dc:date>
    <meta:editing-duration>PT1M2S</meta:editing-duration>
    <meta:editing-cycles>1</meta:editing-cycles>
    <meta:document-statistic meta:table-count="0" meta:image-count="0" meta:object-count="0" meta:page-count="6" meta:paragraph-count="103" meta:word-count="1889" meta:character-count="13666" meta:non-whitespace-character-count="11748"/>
    <meta:generator>LibreOffice/25.2.3.2$Linux_X86_64 LibreOffice_project/520$Build-2</meta:generator>
  </office:meta>
</office:document-meta>
</file>