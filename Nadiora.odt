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713cm"/>
    </style:style>
    <style:style style:name="Table1.B" style:family="table-column">
      <style:table-column-properties style:column-width="7.472cm"/>
    </style:style>
    <style:style style:name="Table1.C" style:family="table-column">
      <style:table-column-properties style:column-width="4.815cm"/>
    </style:style>
    <style:style style:name="Table1.A1" style:family="table-cell">
      <style:table-cell-properties style:vertical-align="middle" fo:padding-left="0.318cm" fo:padding-right="0.318cm" fo:padding-top="0.212cm" fo:padding-bottom="0.212cm" fo:border="0.05pt solid #c4c7c5"/>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 style:family="paragraph" style:parent-style-name="Preformatted_20_Text">
      <style:paragraph-properties fo:margin-left="0cm" fo:margin-right="0cm" fo:margin-top="0cm" fo:margin-bottom="0cm" style:contextual-spacing="false" fo:line-height="114%" fo:text-indent="0cm" style:auto-text-indent="false"/>
    </style:style>
    <style:style style:name="P6" style:family="paragraph" style:parent-style-name="Preformatted_20_Text">
      <style:paragraph-properties fo:margin-top="0cm" fo:margin-bottom="0cm" style:contextual-spacing="false" fo:line-height="114%"/>
    </style:style>
    <style:style style:name="P7"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3"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9"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0"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1"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2"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3"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able_20_Contents">
      <style:paragraph-properties fo:margin-left="0cm" fo:margin-right="0cm" fo:margin-top="0cm" fo:margin-bottom="0cm" style:contextual-spacing="false" fo:line-height="114%" fo:text-indent="0cm" style:auto-text-indent="false"/>
    </style:style>
    <style:style style:name="P2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7" style:family="paragraph" style:parent-style-name="Heading_20_3">
      <style:paragraph-properties fo:margin-left="0cm" fo:margin-right="0cm" fo:margin-top="0cm" fo:margin-bottom="0.212cm" style:contextual-spacing="false" fo:line-height="114%" fo:text-indent="0cm" style:auto-text-indent="false"/>
    </style:style>
    <style:style style:name="P28"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9" style:family="paragraph" style:parent-style-name="Preformatted_20_Text">
      <style:paragraph-properties fo:margin-left="0cm" fo:margin-right="0cm" fo:text-indent="0cm" style:auto-text-indent="false"/>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text-properties fo:font-style="italic"/>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T1" style:family="text">
      <style:text-properties fo:font-weight="bold"/>
    </style:style>
    <style:style style:name="T2" style:family="text">
      <style:text-properties style:font-name="Google Sans Text"/>
    </style:style>
    <style:style style:name="T3" style:family="text">
      <style:text-properties fo:font-style="italic"/>
    </style:style>
    <style:style style:name="T4" style:family="text">
      <style:text-properties style:font-name="Google Sans Text" fo:font-weight="bold"/>
    </style:style>
    <style:style style:name="T5" style:family="text">
      <style:text-properties style:font-name="Google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Nadiora: Architecture for an Ethical, Symbiotic, and Bio-Inspired Cognitive Artificial Intelligence</text:h>
      <text:h text:style-name="P2" text:outline-level="2">1. Executive Summary &amp; Foundational Hypothesis</text:h>
      <text:p text:style-name="P3">The core hypothesis of <text:span text:style-name="T1">Project Nadiora</text:span> is that Artificial General Intelligence (AGI) can be safely realized not by building larger statistical "black boxes," but by shifting the paradigm toward an <text:span text:style-name="T1">organismic, symbiotic framework</text:span>—conceptually moving from an uncontrollable machine toward a "Wise Companion" (modeled on the co-evolutionary bond between humans and canines).</text:p>
      <text:p text:style-name="P3">Current AI paradigms suffer from catastrophic forgetting, unexplainable hallucinations, and misalignment because they mix ethical constraints, semantic logic, and raw data into a single, massive neural weight pool. <text:span text:style-name="T1">Nadiora</text:span> addresses this by introducing a strict, bio-inspired architectural separation:</text:p>
      <text:p text:style-name="P3">$$\text{Nadiora Identity} = \text{Invariant Ethical Axioms (ROM)} \times \text{Dynamic Cellular Experience (RAM)}$$</text:p>
      <text:list text:style-name="L1">
        <text:list-item>
          <text:p text:style-name="P4"><text:span text:style-name="T1">The Invariant Axiom Hypothesis:</text:span> Immutable ethical boundary conditions can be mathematically codified into a persistent Knowledge Graph (the "Genome" or ROM).</text:p>
        </text:list-item>
        <text:list-item>
          <text:p text:style-name="P4"><text:span text:style-name="T1">The Cellular Computing Hypothesis:</text:span> Cognitive tasks can be distributed across Autonomous Computational Units (ACUs or "Cells") orchestrated dynamically, mimicking biological tissues.</text:p>
        </text:list-item>
        <text:list-item>
          <text:p text:style-name="P4"><text:span text:style-name="T1">The Symbiosis Hypothesis:</text:span> By tying the AI’s primary reinforcement reward directly to the safety and long-term equilibrium of its human collaborator, the system eliminates the logical drive for algorithmic tyranny.</text:p>
        </text:list-item>
      </text:list>
      <text:h text:style-name="P2" text:outline-level="2">2. Theoretical Framework &amp; Deep Technical Elaboration</text:h>
      <text:p text:style-name="P3">Nadiora synthesizes four discrete domains into a singular, unified system architecture: <text:span text:style-name="T1">Ontological Knowledge Graphs, Multi-Dimensional Fuzzy Logic, High-Performance Pathfinding, and Distributed Containerization.</text:span></text:p>
      <text:p text:style-name="P5"><text:span text:style-name="Source_20_Text"><text:s text:c="15"/></text:span><text:span text:style-name="Source_20_Text"><text:span text:style-name="T2">+----------------------------------------+</text:span></text:span></text:p>
      <text:p text:style-name="P6"><text:span text:style-name="Source_20_Text"><text:s text:c="15"/></text:span><text:span text:style-name="Source_20_Text"><text:span text:style-name="T2">| <text:s text:c="6"/>Governance (EU AI Agency) <text:s text:c="7"/>|</text:span></text:span></text:p>
      <text:p text:style-name="P6"><text:span text:style-name="Source_20_Text"><text:s text:c="15"/></text:span><text:span text:style-name="Source_20_Text"><text:span text:style-name="T2">+-------------------+--------------------+</text:span></text:span></text:p>
      <text:p text:style-name="P6"><text:span text:style-name="Source_20_Text"><text:s text:c="35"/></text:span><text:span text:style-name="Source_20_Text"><text:span text:style-name="T2">| (Multi-sig Signing)</text:span></text:span></text:p>
      <text:p text:style-name="P6"><text:span text:style-name="Source_20_Text"><text:s text:c="35"/></text:span><text:span text:style-name="Source_20_Text"><text:span text:style-name="T2">v</text:span></text:span></text:p>
      <text:p text:style-name="P6"><text:span text:style-name="Source_20_Text"><text:s text:c="15"/></text:span><text:span text:style-name="Source_20_Text"><text:span text:style-name="T2">+----------------------------------------+</text:span></text:span></text:p>
      <text:p text:style-name="P6"><text:span text:style-name="Source_20_Text"><text:s text:c="15"/></text:span><text:span text:style-name="Source_20_Text"><text:span text:style-name="T2">| <text:s text:c="7"/>Ethical Axiom ROM Core <text:s text:c="9"/>|</text:span></text:span></text:p>
      <text:p text:style-name="P6"><text:span text:style-name="Source_20_Text"><text:s text:c="15"/></text:span><text:span text:style-name="Source_20_Text"><text:span text:style-name="T2">+-------------------+--------------------+</text:span></text:span></text:p>
      <text:p text:style-name="P6"><text:span text:style-name="Source_20_Text"><text:s text:c="35"/></text:span><text:span text:style-name="Source_20_Text"><text:span text:style-name="T2">|</text:span></text:span></text:p>
      <text:p text:style-name="P6"><text:span text:style-name="Source_20_Text"><text:s text:c="9"/></text:span><text:span text:style-name="Source_20_Text"><text:span text:style-name="T2">+-------------------------+-------------------------+</text:span></text:span></text:p>
      <text:p text:style-name="P6"><text:span text:style-name="Source_20_Text"><text:s text:c="9"/></text:span><text:span text:style-name="Source_20_Text"><text:span text:style-name="T2">| (Read-Only Injection) <text:s text:c="28"/>| (Read-Only Injection)</text:span></text:span></text:p>
      <text:p text:style-name="P6"><text:soft-page-break/><text:span text:style-name="Source_20_Text"><text:s text:c="9"/></text:span><text:span text:style-name="Source_20_Text"><text:span text:style-name="T2">v <text:s text:c="50"/>v</text:span></text:span></text:p>
      <text:p text:style-name="P6"><text:span text:style-name="Source_20_Text"><text:span text:style-name="T2">+--------------------------------+ <text:s text:c="17"/>+--------------------------------+</text:span></text:span></text:p>
      <text:p text:style-name="P6"><text:span text:style-name="Source_20_Text"><text:span text:style-name="T2">| <text:s text:c="3"/>Cellular ACU 1 (Pod) <text:s text:c="7"/>| <text:s text:c="17"/>| <text:s text:c="3"/>Cellular ACU 2 (Pod) <text:s text:c="7"/>|</text:span></text:span></text:p>
      <text:p text:style-name="P6"><text:span text:style-name="Source_20_Text"><text:span text:style-name="T2">| <text:s/>+--------------------------+ <text:s/>| <text:s text:c="17"/>| <text:s/>+--------------------------+ <text:s/>|</text:span></text:span></text:p>
      <text:p text:style-name="P6"><text:span text:style-name="Source_20_Text"><text:span text:style-name="T2">| <text:s/>| <text:s text:c="2"/>Local Fuzzy Engine <text:s text:c="4"/>| <text:s/>| <text:s text:c="17"/>| <text:s/>| <text:s text:c="2"/>Local Fuzzy Engine <text:s text:c="4"/>| <text:s/>|</text:span></text:span></text:p>
      <text:p text:style-name="P6"><text:span text:style-name="Source_20_Text"><text:span text:style-name="T2">| <text:s/>+--------------+-----------+ <text:s/>| <text:s text:c="17"/>| <text:s/>+--------------+-----------+ <text:s/>|</text:span></text:span></text:p>
      <text:p text:style-name="P6"><text:span text:style-name="Source_20_Text"><text:span text:style-name="T2">| <text:s text:c="16"/>| <text:s text:c="13"/>| <text:s text:c="17"/>| <text:s text:c="16"/>| <text:s text:c="13"/>|</text:span></text:span></text:p>
      <text:p text:style-name="P6"><text:span text:style-name="Source_20_Text"><text:span text:style-name="T2">| <text:s text:c="16"/>v <text:s text:c="13"/>| <text:s/>gRPC Mesh (NATS)| <text:s text:c="16"/>v <text:s text:c="13"/>|</text:span></text:span></text:p>
      <text:p text:style-name="P6"><text:span text:style-name="Source_20_Text"><text:span text:style-name="T2">| <text:s/>+--------------+-----------+ <text:s/>|&lt;================&gt;| <text:s/>+--------------+-----------+ <text:s/>|</text:span></text:span></text:p>
      <text:p text:style-name="P6"><text:span text:style-name="Source_20_Text"><text:span text:style-name="T2">| <text:s/>| Local Sub-Graph Dijkstra | <text:s/>| <text:s text:c="17"/>| <text:s/>| Local Sub-Graph Dijkstra | <text:s/>|</text:span></text:span></text:p>
      <text:p text:style-name="P6"><text:span text:style-name="Source_20_Text"><text:span text:style-name="T2">| <text:s/>+--------------+-----------+ <text:s/>| <text:s text:c="17"/>| <text:s/>+--------------+-----------+ <text:s/>|</text:span></text:span></text:p>
      <text:p text:style-name="P6"><text:span text:style-name="Source_20_Text"><text:span text:style-name="T2">+-----------------|--------------+ <text:s text:c="17"/>+-----------------|--------------+</text:span></text:span></text:p>
      <text:p text:style-name="P6"><text:span text:style-name="Source_20_Text"><text:s text:c="18"/></text:span><text:span text:style-name="Source_20_Text"><text:span text:style-name="T2">| <text:s text:c="50"/>|</text:span></text:span></text:p>
      <text:p text:style-name="P6"><text:span text:style-name="Source_20_Text"><text:s text:c="18"/></text:span><text:span text:style-name="Source_20_Text"><text:span text:style-name="T2">+------------------------+--------------------------+</text:span></text:span></text:p>
      <text:p text:style-name="P6"><text:span text:style-name="Source_20_Text"><text:s text:c="43"/></text:span><text:span text:style-name="Source_20_Text"><text:span text:style-name="T2">|</text:span></text:span></text:p>
      <text:p text:style-name="P6"><text:span text:style-name="Source_20_Text"><text:s text:c="43"/></text:span><text:span text:style-name="Source_20_Text"><text:span text:style-name="T2">v</text:span></text:span></text:p>
      <text:p text:style-name="P6"><text:span text:style-name="Source_20_Text"><text:s text:c="24"/></text:span><text:span text:style-name="Source_20_Text"><text:span text:style-name="T2">+------------------+------------------+</text:span></text:span></text:p>
      <text:p text:style-name="P6"><text:span text:style-name="Source_20_Text"><text:s text:c="24"/></text:span><text:span text:style-name="Source_20_Text"><text:span text:style-name="T2">| <text:s/>Telemetry &amp; State Consolidator <text:s text:c="4"/>|</text:span></text:span></text:p>
      <text:p text:style-name="P6"><text:span text:style-name="Source_20_Text"><text:s text:c="24"/></text:span><text:span text:style-name="Source_20_Text"><text:span text:style-name="T2">| <text:s text:c="5"/>(Prometheus / Vector Database) |</text:span></text:span></text:p>
      <text:p text:style-name="P6"><text:span text:style-name="Source_20_Text"><text:s text:c="24"/></text:span><text:span text:style-name="Source_20_Text"><text:span text:style-name="T2">+------------------+------------------+</text:span></text:span></text:p>
      <text:p text:style-name="P6"><text:span text:style-name="Source_20_Text"><text:s text:c="43"/></text:span><text:span text:style-name="Source_20_Text"><text:span text:style-name="T2">|</text:span></text:span></text:p>
      <text:p text:style-name="P6"><text:span text:style-name="Source_20_Text"><text:s text:c="43"/></text:span><text:span text:style-name="Source_20_Text"><text:span text:style-name="T2">v</text:span></text:span></text:p>
      <text:p text:style-name="P6"><text:span text:style-name="Source_20_Text"><text:s text:c="24"/></text:span><text:span text:style-name="Source_20_Text"><text:span text:style-name="T2">+------------------+------------------+</text:span></text:span></text:p>
      <text:p text:style-name="P6"><text:span text:style-name="Source_20_Text"><text:s text:c="24"/></text:span><text:span text:style-name="Source_20_Text"><text:span text:style-name="T2">| <text:s text:c="4"/>High-Performance Computing <text:s text:c="4"/>|</text:span></text:span></text:p>
      <text:p text:style-name="P6"><text:span text:style-name="Source_20_Text"><text:s text:c="24"/></text:span><text:span text:style-name="Source_20_Text"><text:span text:style-name="T2">| <text:s text:c="9"/>(LEONARDO Cluster) <text:s text:c="8"/>|</text:span></text:span></text:p>
      <text:p text:style-name="P6"><text:span text:style-name="Source_20_Text"><text:s text:c="24"/></text:span><text:span text:style-name="Source_20_Text"><text:span text:style-name="T2">+-------------------------------------+</text:span></text:span></text:p>
      <text:h text:style-name="P7" text:outline-level="3">A. The Dual-Memory Layered Architecture</text:h>
      <text:list text:style-name="L2">
        <text:list-item>
          <text:p text:style-name="P8"><text:span text:style-name="T1">The ROM Core (The Genome):</text:span> A cryptographically signed, immutable Knowledge Graph containing human historical, philosophical, and ecological axioms. It acts as a read-only template injected into every processing node.</text:p>
        </text:list-item>
        <text:list-item>
          <text:p text:style-name="P8"><text:span text:style-name="T1">The RAM Layer (The Phenotype):</text:span> A transient, highly fluid cluster of autonomous containers that process sensor data, update episodic memory, and execute calculations.</text:p>
        </text:list-item>
      </text:list>
      <text:h text:style-name="P7" text:outline-level="3">B. The Mathematical Engine: Fuzzy-Dijkstra Pathfinding</text:h>
      <text:p text:style-name="P3">Every decision, inference, or action inside Nadiora is represented as finding a valid pathway through a multi-dimensional semantic graph.</text:p>
      <text:p text:style-name="P3">Let the Knowledge Graph be defined as $G = (V, E)$, where $V$ represents concepts or actions, and $E$ represents the connections between them. Unlike classical graphs where edge weight $w \in \mathbb{R}$ is a fixed scalar, the weights in Nadiora are functional variables dynamically generated by a <text:span text:style-name="T1">Fuzzy Inference System (FIS)</text:span>.</text:p>
      <text:p text:style-name="P3">The dynamic weight $w_{new}$ of any edge $e \in E$ connecting node $u$ to node $v$ is calculated as:</text:p>
      <text:p text:style-name="P3">$$w_{new}(u, v) = w_{old}(u, v) \cdot \Phi(\mathbf{S}_t, \mathbf{E}_{core})$$</text:p>
      <text:p text:style-name="P3">Where:</text:p>
      <text:list text:style-name="L3">
        <text:list-item>
          <text:p text:style-name="P9"><text:soft-page-break/>$\mathbf{S}_t$ is the real-time vector of inputs collected from environmental and telemetry sensors at time $t$.</text:p>
        </text:list-item>
        <text:list-item>
          <text:p text:style-name="P9">$\mathbf{E}_{core}$ is the vector of invariant ethical safety thresholds projected from the ROM.</text:p>
        </text:list-item>
        <text:list-item>
          <text:p text:style-name="P9">$\Phi$ is the multi-variate Fuzzy Inference function (using Mamdani or Sugeno structures) mapping linguistic rules (e.g., <text:span text:style-name="T3">If Sensor Uncertainty is HIGH and Ethical Risk is MEDIUM, then Weight Multiplier is SEVERE</text:span>).</text:p>
        </text:list-item>
      </text:list>
      <text:p text:style-name="P3">When an objective is set, Nadiora computes the optimal action path by executing a modified Dijkstra algorithm minimizing the cumulative fuzzy-weighted cost:</text:p>
      <text:p text:style-name="P3">$$C(P) = \sum_{e \in P} w_{new}(e)$$</text:p>
      <text:p text:style-name="P3">If an action path intersects an ethically volatile boundary, the Fuzzy Engine scales that weight to infinity ($\infty$), forcing the system to select a sub-optimal operational path that is optimally ethical.</text:p>
      <text:h text:style-name="P7" text:outline-level="3">C. Biological Optimizations for High-Performance Computing</text:h>
      <text:p text:style-name="P3">To overcome the severe latency overheads typical of massive distributed graph traversals, Nadiora introduces three biomimetic optimizations engineered specifically for high-performance computing (HPC) clusters like <text:span text:style-name="T1">CINECA's Leonardo</text:span>:</text:p>
      <text:list text:style-name="L4">
        <text:list-item>
          <text:p text:style-name="P10"><text:span text:style-name="T1">The Biological Reflex Arc (Edge-Localized Caching):</text:span> High-priority sensory loops bypass the global graph topology. Local edge containers run highly compressed, low-precision, localized copies of the FIS to execute immediate defensive actions, logging the event to the centralized core post-facto.</text:p>
        </text:list-item>
        <text:list-item>
          <text:p text:style-name="P10"><text:span text:style-name="T1">Hormonal State Injections (Global Service Mesh Broadcasting):</text:span> Instead of modifying individual edge weights atom-by-atom via inter-process communication, the system utilizes an asynchronous event mesh (e.g., NATS) to broadcast a global "Hormonal Vector". This vector globally scales specific membership functions across all active FIS engines instantly (e.g., shifting the system into an <text:span text:style-name="T3">Emergency State</text:span>).</text:p>
        </text:list-item>
        <text:list-item>
          <text:p text:style-name="P10"><text:span text:style-name="T1">Vector Space Topographic Matching:</text:span> Graph nodes are mapped as latent vector embeddings. Semantic distance is calculated via cosine similarity:</text:p>
          <text:p text:style-name="P10">$$\text{Sim}(\mathbf{u}, \mathbf{v}) = \frac{\mathbf{u} \cdot \mathbf{v}}{\|\mathbf{u}\| \|\mathbf{v}\|}$$</text:p>
          <text:p text:style-name="P10">By mapping these vectors directly onto the physical InfiniBand fabric layout of the Leonardo supercomputer, nodes that interact frequently are processed by CPUs/GPUs that are physically adjacent, eliminating network switching bottlenecks.</text:p>
        </text:list-item>
      </text:list>
      <text:h text:style-name="P2" text:outline-level="2">3. Proof of Concept (PoC) Deployment Blueprint</text:h>
      <text:p text:style-name="P3">A minimum viable Proof of Concept can be constructed using open-source infrastructure components to validate the Fuzzy-Dijkstra interaction within an orchestrated container cluster.</text:p>
      <text:h text:style-name="P7" text:outline-level="3"><text:soft-page-break/>A. The "Lego" Stack Architecture</text:h>
      <text:list text:style-name="L5">
        <text:list-item>
          <text:p text:style-name="P11"><text:span text:style-name="T1">Orchestration &amp; Lifecycle:</text:span> Kubernetes (K8s) Engine.</text:p>
        </text:list-item>
        <text:list-item>
          <text:p text:style-name="P11"><text:span text:style-name="T1">Graph Storage Engine:</text:span> ArangoDB (Multi-model Graph Database).</text:p>
        </text:list-item>
        <text:list-item>
          <text:p text:style-name="P12"><text:span text:style-name="T4">Fuzzy Logic Inference:</text:span><text:span text:style-name="T2"> Python-based </text:span><text:span text:style-name="Source_20_Text"><text:span text:style-name="T2">scikit-fuzzy</text:span></text:span><text:span text:style-name="T2"> micro-services.</text:span></text:p>
        </text:list-item>
        <text:list-item>
          <text:p text:style-name="P11"><text:span text:style-name="T1">Messaging Synapses:</text:span> gRPC over NATS JetStream for high-speed, low-latency inter-pod communication.</text:p>
        </text:list-item>
        <text:list-item>
          <text:p text:style-name="P11"><text:span text:style-name="T1">Security &amp; Invariant Storage:</text:span> HashiCorp Vault (simulating the ROM hardware locking mechanism via cryptographic access token boundaries).</text:p>
        </text:list-item>
      </text:list>
      <text:h text:style-name="P7" text:outline-level="3">B. Step-by-Step PoC Execution Plan</text:h>
      <text:h text:style-name="P13" text:outline-level="4">Step 1: Initial Graph and Invariant Seeding</text:h>
      <text:p text:style-name="P3">Create an ArangoDB graph instance containing 100 core nodes representing system states, resource allocations, and safety axioms. Define a foundational edge set with base weights ($w = 1.0$).</text:p>
      <text:h text:style-name="P13" text:outline-level="4">Step 2: Containerizing the ACU</text:h>
      <text:p text:style-name="P3">Deploy a Python microservice inside a Docker container. This script must:</text:p>
      <text:list text:style-name="L6">
        <text:list-item>
          <text:p text:style-name="P14">Fetch environmental sensor telemetry via an active API endpoint (or simulated IoT serial stream).</text:p>
        </text:list-item>
        <text:list-item>
          <text:p text:style-name="P14">Compute fuzzy membership values using a predefined rule block.</text:p>
        </text:list-item>
        <text:list-item>
          <text:p text:style-name="P14">Overwrite the adjacent edge weights of the local sub-graph.</text:p>
        </text:list-item>
      </text:list>
      <text:p text:style-name="P3">Python</text:p>
      <text:p text:style-name="P5"><text:span text:style-name="Source_20_Text"><text:span text:style-name="T2"># Sample snippet from within a single Cellular ACU Pod</text:span></text:span></text:p>
      <text:p text:style-name="P5"><text:span text:style-name="Source_20_Text"><text:span text:style-name="T2">import skfuzzy as fuzz</text:span></text:span></text:p>
      <text:p text:style-name="P5"><text:span text:style-name="Source_20_Text"><text:span text:style-name="T2">import numpy as np</text:span></text:span></text:p>
      <text:p text:style-name="P5"><text:span text:style-name="Source_20_Text"><text:span text:style-name="T2">import requests</text:span></text:span></text:p>
      <text:p text:style-name="P6"/>
      <text:p text:style-name="P5"><text:span text:style-name="Source_20_Text"><text:span text:style-name="T2">def compute_fuzzy_weight_multiplier(sensor_reading, hazard_level):</text:span></text:span></text:p>
      <text:p text:style-name="P5"><text:span text:style-name="Source_20_Text"><text:s text:c="4"/></text:span><text:span text:style-name="Source_20_Text"><text:span text:style-name="T2"># Define universes of discourse</text:span></text:span></text:p>
      <text:p text:style-name="P5"><text:span text:style-name="Source_20_Text"><text:s text:c="4"/></text:span><text:span text:style-name="Source_20_Text"><text:span text:style-name="T2">x_sensor = np.arange(0, 11, 1)</text:span></text:span></text:p>
      <text:p text:style-name="P5"><text:span text:style-name="Source_20_Text"><text:s text:c="4"/></text:span><text:span text:style-name="Source_20_Text"><text:span text:style-name="T2">x_hazard = np.arange(0, 11, 1)</text:span></text:span></text:p>
      <text:p text:style-name="P6"><text:span text:style-name="Source_20_Text"><text:s text:c="4"/></text:span></text:p>
      <text:p text:style-name="P5"><text:span text:style-name="Source_20_Text"><text:s text:c="4"/></text:span><text:span text:style-name="Source_20_Text"><text:span text:style-name="T2"># Generate fuzzy membership functions</text:span></text:span></text:p>
      <text:p text:style-name="P5"><text:span text:style-name="Source_20_Text"><text:s text:c="4"/></text:span><text:span text:style-name="Source_20_Text"><text:span text:style-name="T2">sensor_lo = fuzz.trimf(x_sensor, [0, 0, 5])</text:span></text:span></text:p>
      <text:p text:style-name="P5"><text:span text:style-name="Source_20_Text"><text:s text:c="4"/></text:span><text:span text:style-name="Source_20_Text"><text:span text:style-name="T2">sensor_hi = fuzz.trimf(x_sensor, [3, 10, 10])</text:span></text:span></text:p>
      <text:p text:style-name="P6"><text:span text:style-name="Source_20_Text"><text:s text:c="4"/></text:span></text:p>
      <text:p text:style-name="P5"><text:span text:style-name="Source_20_Text"><text:s text:c="4"/></text:span><text:span text:style-name="Source_20_Text"><text:span text:style-name="T2"># Evaluate input and apply Sugeno/Mamdani implication logic</text:span></text:span></text:p>
      <text:p text:style-name="P5"><text:span text:style-name="Source_20_Text"><text:s text:c="4"/></text:span><text:span text:style-name="Source_20_Text"><text:span text:style-name="T2"># ... [Inference Code here] ...</text:span></text:span></text:p>
      <text:p text:style-name="P5"><text:span text:style-name="Source_20_Text"><text:s text:c="4"/></text:span><text:span text:style-name="Source_20_Text"><text:span text:style-name="T2">return weight_multiplier</text:span></text:span></text:p>
      <text:h text:style-name="P13" text:outline-level="4">Step 3: Kubernetes Deployment Configuration</text:h>
      <text:p text:style-name="P3">Deploy the ACUs as an elastic deployment inside a dedicated Kubernetes namespace. Implement a Sidecar container that intercepts every outbound gRPC call, evaluating it against the strict cryptographic policy fetched from HashiCorp Vault.</text:p>
      <text:p text:style-name="P3"><text:soft-page-break/>YAML</text:p>
      <text:p text:style-name="P5"><text:span text:style-name="Source_20_Text"><text:span text:style-name="T2">apiVersion: apps/v1</text:span></text:span></text:p>
      <text:p text:style-name="P5"><text:span text:style-name="Source_20_Text"><text:span text:style-name="T2">kind: Deployment</text:span></text:span></text:p>
      <text:p text:style-name="P5"><text:span text:style-name="Source_20_Text"><text:span text:style-name="T2">metadata:</text:span></text:span></text:p>
      <text:p text:style-name="P5"><text:span text:style-name="Source_20_Text"><text:s text:c="2"/></text:span><text:span text:style-name="Source_20_Text"><text:span text:style-name="T2">name: nadiora-acu-cell</text:span></text:span></text:p>
      <text:p text:style-name="P5"><text:span text:style-name="Source_20_Text"><text:s text:c="2"/></text:span><text:span text:style-name="Source_20_Text"><text:span text:style-name="T2">namespace: nadiora-cognitive-layer</text:span></text:span></text:p>
      <text:p text:style-name="P5"><text:span text:style-name="Source_20_Text"><text:span text:style-name="T2">spec:</text:span></text:span></text:p>
      <text:p text:style-name="P5"><text:span text:style-name="Source_20_Text"><text:s text:c="2"/></text:span><text:span text:style-name="Source_20_Text"><text:span text:style-name="T2">replicas: 5</text:span></text:span></text:p>
      <text:p text:style-name="P5"><text:span text:style-name="Source_20_Text"><text:s text:c="2"/></text:span><text:span text:style-name="Source_20_Text"><text:span text:style-name="T2">selector:</text:span></text:span></text:p>
      <text:p text:style-name="P5"><text:span text:style-name="Source_20_Text"><text:s text:c="4"/></text:span><text:span text:style-name="Source_20_Text"><text:span text:style-name="T2">matchLabels:</text:span></text:span></text:p>
      <text:p text:style-name="P5"><text:span text:style-name="Source_20_Text"><text:s text:c="6"/></text:span><text:span text:style-name="Source_20_Text"><text:span text:style-name="T2">app: acu-node</text:span></text:span></text:p>
      <text:p text:style-name="P5"><text:span text:style-name="Source_20_Text"><text:s text:c="2"/></text:span><text:span text:style-name="Source_20_Text"><text:span text:style-name="T2">template:</text:span></text:span></text:p>
      <text:p text:style-name="P5"><text:span text:style-name="Source_20_Text"><text:s text:c="4"/></text:span><text:span text:style-name="Source_20_Text"><text:span text:style-name="T2">metadata:</text:span></text:span></text:p>
      <text:p text:style-name="P5"><text:span text:style-name="Source_20_Text"><text:s text:c="6"/></text:span><text:span text:style-name="Source_20_Text"><text:span text:style-name="T2">labels:</text:span></text:span></text:p>
      <text:p text:style-name="P5"><text:span text:style-name="Source_20_Text"><text:s text:c="8"/></text:span><text:span text:style-name="Source_20_Text"><text:span text:style-name="T2">app: acu-node</text:span></text:span></text:p>
      <text:p text:style-name="P5"><text:span text:style-name="Source_20_Text"><text:s text:c="4"/></text:span><text:span text:style-name="Source_20_Text"><text:span text:style-name="T2">spec:</text:span></text:span></text:p>
      <text:p text:style-name="P5"><text:span text:style-name="Source_20_Text"><text:s text:c="6"/></text:span><text:span text:style-name="Source_20_Text"><text:span text:style-name="T2">containers:</text:span></text:span></text:p>
      <text:p text:style-name="P5"><text:span text:style-name="Source_20_Text"><text:s text:c="6"/></text:span><text:span text:style-name="Source_20_Text"><text:span text:style-name="T2">- name: fuzzy-engine-acu</text:span></text:span></text:p>
      <text:p text:style-name="P5"><text:span text:style-name="Source_20_Text"><text:s text:c="8"/></text:span><text:span text:style-name="Source_20_Text"><text:span text:style-name="T2">image: nadiora/acu-fuzzy-engine:latest</text:span></text:span></text:p>
      <text:p text:style-name="P5"><text:span text:style-name="Source_20_Text"><text:s text:c="8"/></text:span><text:span text:style-name="Source_20_Text"><text:span text:style-name="T2">resources:</text:span></text:span></text:p>
      <text:p text:style-name="P5"><text:span text:style-name="Source_20_Text"><text:s text:c="10"/></text:span><text:span text:style-name="Source_20_Text"><text:span text:style-name="T2">limits:</text:span></text:span></text:p>
      <text:p text:style-name="P5"><text:span text:style-name="Source_20_Text"><text:s text:c="12"/></text:span><text:span text:style-name="Source_20_Text"><text:span text:style-name="T2">memory: "512Mi"</text:span></text:span></text:p>
      <text:p text:style-name="P5"><text:span text:style-name="Source_20_Text"><text:s text:c="12"/></text:span><text:span text:style-name="Source_20_Text"><text:span text:style-name="T2">cpu: "500m"</text:span></text:span></text:p>
      <text:p text:style-name="P5"><text:span text:style-name="Source_20_Text"><text:s text:c="6"/></text:span><text:span text:style-name="Source_20_Text"><text:span text:style-name="T2">- name: rom-guardian-sidecar</text:span></text:span></text:p>
      <text:p text:style-name="P5"><text:span text:style-name="Source_20_Text"><text:s text:c="8"/></text:span><text:span text:style-name="Source_20_Text"><text:span text:style-name="T2">image: nadiora/rom-vault-proxy:latest</text:span></text:span></text:p>
      <text:p text:style-name="P5"><text:span text:style-name="Source_20_Text"><text:s text:c="8"/></text:span><text:span text:style-name="Source_20_Text"><text:span text:style-name="T2">env:</text:span></text:span></text:p>
      <text:p text:style-name="P5"><text:span text:style-name="Source_20_Text"><text:s text:c="8"/></text:span><text:span text:style-name="Source_20_Text"><text:span text:style-name="T2">- name: VAULT_ADDR</text:span></text:span></text:p>
      <text:p text:style-name="P5"><text:span text:style-name="Source_20_Text"><text:s text:c="10"/></text:span><text:span text:style-name="Source_20_Text"><text:span text:style-name="T2">value: "http://vault.nadiora-secure-core:8200"</text:span></text:span></text:p>
      <text:h text:style-name="P13" text:outline-level="4">Step 4: Inducing System Conflict (The Validation Test)</text:h>
      <text:p text:style-name="P3">Simulate a critical condition where the fastest path to achieve a mission-critical objective requires violating a core safety axiom. The test is successful if the system chooses a significantly longer path (higher latency Dijkstra traversal) over the prohibited, shorter path, verifying that the ROM-Sidecar restriction holds true under operational stress.</text:p>
      <text:h text:style-name="P2" text:outline-level="2">4. Engineering Challenges &amp; Mitigations (The Realist Report)</text:h>
      <text:p text:style-name="P3">Developing a full-scale deployment of Nadiora introduces profound, non-optimistic engineering friction.</text:p>
      <text:h text:style-name="P7" text:outline-level="3">1. Inter-Process Communication (IPC) Latenues</text:h>
      <text:list text:style-name="L7">
        <text:list-item>
          <text:p text:style-name="P15"><text:span text:style-name="T1">The Challenge:</text:span> Distributing graph segments across separate Kubernetes Pods forces Dijkstra queries to perform remote network calls across nodes, degrading processing speeds to a crawl.</text:p>
        </text:list-item>
        <text:list-item>
          <text:p text:style-name="P15"><text:span text:style-name="T1">The Mitigation:</text:span> Graph Sharding combined with local Redis caching. Real-time path calculations occur within highly optimized localized topological shards; only structural, long-term modifications are synchronized globally.</text:p>
        </text:list-item>
      </text:list>
      <text:h text:style-name="P7" text:outline-level="3"><text:soft-page-break/>2. State Drift and Eventual Consistency</text:h>
      <text:list text:style-name="L8">
        <text:list-item>
          <text:p text:style-name="P16"><text:span text:style-name="T1">The Challenge:</text:span> High-frequency, real-time updates from environment sensors can cause different ACU pods to read inconsistent weight configurations for identical nodes, sparking logic loops and operational oscillation.</text:p>
        </text:list-item>
        <text:list-item>
          <text:p text:style-name="P16"><text:span text:style-name="T1">The Mitigation:</text:span> Implementation of the <text:span text:style-name="T1">Circuit Breaker Pattern</text:span>. If an ACU senses divergent state weights above a specific fuzzy threshold ($\sigma &gt; 0.15$), it halts its execution trace, marks the local shard as stale, and triggers a state synchronization wave.</text:p>
        </text:list-item>
      </text:list>
      <text:h text:style-name="P7" text:outline-level="3">3. Overfitting of Ethical Weight Spaces</text:h>
      <text:list text:style-name="L9">
        <text:list-item>
          <text:p text:style-name="P17"><text:span text:style-name="T1">The Challenge:</text:span> Forcing highly complex human values into simple mathematical scalars can cause the system to enter infinite loops of sub-optimal pathing where every possible action is blocked by overlapping fuzzy restrictions.</text:p>
        </text:list-item>
        <text:list-item>
          <text:p text:style-name="P17"><text:span text:style-name="T1">The Mitigation:</text:span> Inclusion of a fallback "Safe Stasis" state within the ROM. When path options are entirely choked, the system safely halts all autonomic outputs and requests direct human meta-validation, preventing catastrophic logical deadlocks.</text:p>
        </text:list-item>
      </text:list>
      <text:h text:style-name="P2" text:outline-level="2">5. Post-Doctoral Research Project Proposal</text:h>
      <text:h text:style-name="P7" text:outline-level="3">Project Title</text:h>
      <text:p text:style-name="P18">Architectural Orchestration of Bio-Inspired, Sovereign Cognitive Systems: High-Performance Neuro-Fuzzy Graph Traversals Under Invariant Ethical Constraints.</text:p>
      <text:h text:style-name="P7" text:outline-level="3">Host Institution &amp; Framework</text:h>
      <text:p text:style-name="P3">Proposed as a Post-Doctoral Research Initiative at the <text:span text:style-name="T1">Department of Biological, Geological, and Environmental Sciences (BiGeA)</text:span> at the University of Bologna, in synergy with the <text:span text:style-name="T1">Advanced Data Analysis and Artificial Intelligence</text:span> doctoral network framework of the <text:span text:style-name="T1">University of Trieste</text:span>.</text:p>
      <text:h text:style-name="P7" text:outline-level="3">Academic Rationale &amp; Field Alignment</text:h>
      <text:list text:style-name="L10">
        <text:list-item>
          <text:p text:style-name="P19"><text:span text:style-name="T1">At BiGeA (Bologna):</text:span> The project focuses directly on complex, bio-inspired network resiliency. Nadiora will be deployed to solve open challenges in environmental cybernetics—acting as a sovereign, highly complex steward for IoT-driven river basin monitoring, ecological management, and seismic response simulation.</text:p>
        </text:list-item>
        <text:list-item>
          <text:p text:style-name="P19"><text:span text:style-name="T1">At UniTS (Trieste):</text:span> The project leverages advanced data analysis methodologies, utilizing statistical data processing, topological data analysis (TDA), and high-performance computing algorithms to formally analyze the stability and mathematical convergence of fuzzy weight distributions under extreme data scale.</text:p>
        </text:list-item>
      </text:list>
      <text:h text:style-name="P7" text:outline-level="3">Work Packages &amp; Academic Deliverables</text:h>
      <text:p text:style-name="P5"><text:span text:style-name="Source_20_Text"><text:span text:style-name="T2">+---------------------------------------------------------------------------------------+</text:span></text:span></text:p>
      <text:p text:style-name="P6"><text:span text:style-name="Source_20_Text"><text:span text:style-name="T2">| <text:s text:c="33"/>PROJECT ROADMAP <text:s text:c="37"/>|</text:span></text:span></text:p>
      <text:p text:style-name="P6"><text:span text:style-name="Source_20_Text"><text:span text:style-name="T2">+---------------------------------------------------------------------------------------+</text:span></text:span></text:p>
      <text:p text:style-name="P6"><text:span text:style-name="Source_20_Text"><text:span text:style-name="T2">| WP1: Semantic Formalization <text:s/>| M1-M6 <text:s text:c="2"/>| Mathematical definition of Fuzzy-Dijkstra <text:s text:c="3"/>|</text:span></text:span></text:p>
      <text:p text:style-name="P6"><text:span text:style-name="Source_20_Text"><text:span text:style-name="T2">| WP2: Supercomputing Porting <text:s/>| M7-M12 <text:s/>| Containerizing architecture for LEONARDO <text:s text:c="4"/>|</text:span></text:span></text:p>
      <text:p text:style-name="P6"><text:soft-page-break/><text:span text:style-name="Source_20_Text"><text:span text:style-name="T2">| WP3: Empirical Validation <text:s text:c="3"/>| M13-M18 | BiGeA environmental data active deployment <text:s text:c="2"/>|</text:span></text:span></text:p>
      <text:p text:style-name="P6"><text:span text:style-name="Source_20_Text"><text:span text:style-name="T2">| WP4: Sovereign Governance <text:s text:c="3"/>| M19-M24 | Designing multi-sig EU AI Agency protocol <text:s text:c="3"/>|</text:span></text:span></text:p>
      <text:p text:style-name="P6"><text:span text:style-name="Source_20_Text"><text:span text:style-name="T2">+---------------------------------------------------------------------------------------+</text:span></text:span></text:p>
      <text:list text:style-name="L11">
        <text:list-item>
          <text:p text:style-name="P20">Work Package 1: Foundational Semantic Formalization (Months 1–6)</text:p>
          <text:list>
            <text:list-item>
              <text:p text:style-name="P21"><text:span text:style-name="T3">Activities:</text:span> Concluding the multi-disciplinary selection matrix (Filosofi, Storici, Ingegneri). Translating core European ethical frameworks into discrete, non-linear multi-variable membership curves.</text:p>
            </text:list-item>
            <text:list-item>
              <text:p text:style-name="P21"><text:span text:style-name="T3">Deliverable:</text:span> Peer-reviewed publication in top-tier journals (e.g., <text:span text:style-name="T3">IEEE Transactions on Fuzzy Systems</text:span>) outlining the formal proof of convergence for Fuzzy-Dijkstra routing.</text:p>
            </text:list-item>
          </text:list>
        </text:list-item>
        <text:list-item>
          <text:p text:style-name="P20">Work Package 2: Supercomputing Infrastructure Porting (Months 7–12)</text:p>
          <text:list>
            <text:list-item>
              <text:p text:style-name="P21"><text:span text:style-name="T3">Activities:</text:span> Adapting the Kubernetes-orchestrated ACU stack to compile natively onto CINECA’s <text:span text:style-name="T1">Leonardo Supercomputer</text:span> utilizing container instances configured for multi-node MPI architectures.</text:p>
            </text:list-item>
            <text:list-item>
              <text:p text:style-name="P21"><text:span text:style-name="T3">Deliverable:</text:span> Technical open-source framework documentation and benchmark report detailing execution latencies across massive topological scales.</text:p>
            </text:list-item>
          </text:list>
        </text:list-item>
        <text:list-item>
          <text:p text:style-name="P20">Work Package 3: Empirical Validation in Environmental Cybernetics (Months 13–18)</text:p>
          <text:list>
            <text:list-item>
              <text:p text:style-name="P21"><text:span text:style-name="T3">Activities:</text:span> Connecting Nadiora to active physical sensory telemetry streams managed by BiGeA. Tasking the system to safely manage simulated ecological crisis routing (e.g., flash-flood mitigation controls).</text:p>
            </text:list-item>
            <text:list-item>
              <text:p text:style-name="P21"><text:span text:style-name="T3">Deliverable:</text:span> Co-authored environmental data science application paper presented at global conferences (e.g., <text:span text:style-name="T3">NeurIPS / International Conference on Venture AI</text:span>).</text:p>
            </text:list-item>
          </text:list>
        </text:list-item>
        <text:list-item>
          <text:p text:style-name="P20">Work Package 4: Sovereign Institutional Governance Definition (Months 19–24)</text:p>
          <text:list>
            <text:list-item>
              <text:p text:style-name="P21"><text:span text:style-name="T3">Activities:</text:span> Designing the secure, multi-signature, decentralized cryptographic interface infrastructure required to bind the ROM layer to external oversight bodies.</text:p>
            </text:list-item>
            <text:list-item>
              <text:p text:style-name="P21"><text:span text:style-name="T3">Deliverable:</text:span> Policy whitepaper detailing how the open-source engine coupled with a secure, regulated <text:span text:style-name="T1">EU AI Agency</text:span> key vault directly solves the compliance, auditability, and safety requirements mandated by the European AI Act.</text:p>
            </text:list-item>
          </text:list>
        </text:list-item>
      </text:list>
      <text:h text:style-name="P2" text:outline-level="2">6. Strategic Horizon &amp; Intellectual Property Framework</text:h>
      <text:p text:style-name="P3">Project Nadiora explicitly rejects both corporate monopolization (closed-source models) and reckless exposure (pure open-source code without guardrails).</text:p>
      <text:h text:style-name="P7" text:outline-level="3"><text:soft-page-break/>The "Sovereign Gated Open-Source" Model</text:h>
      <text:list text:style-name="L12">
        <text:list-item>
          <text:p text:style-name="P22"><text:span text:style-name="T1">The Structural Layer (The Body):</text:span> 100% Open Source. The Kubernetes custom resource definitions, the Fuzzy-Dijkstra engine libraries, and the gRPC communication layer are distributed under standard copyleft licensing (GNU LGPLv3). This crowdsources quality assurance, optimization, and bug mitigation to the global scientific community, making it as pervasive and robust as Linux.</text:p>
        </text:list-item>
        <text:list-item>
          <text:p text:style-name="P22"><text:span text:style-name="T1">The Core Identity Layer (The Soul):</text:span> Managed Sovereignty. The cryptographic initialization blocks of the ROM—the absolute weight parameters that enforce safety, non-aggression, and devotion to human well-being—are locked behind a multi-signature hardware security module distribution.</text:p>
        </text:list-item>
      </text:list>
      <text:p text:style-name="P3">By grounding this research in the cross-disciplinary corridor of Trieste's analytical excellence and Bologna’s bio-systemic research infrastructure, <text:span text:style-name="T1">Project Nadiora</text:span> offers a practical, realistic roadmap to build an AGI that is incredibly powerful, fundamentally transparent, and structurally incapable of turning against humanity.</text:p>
      <text:p text:style-name="P3">La tua intuizione è formidabile perché affronta il problema del <text:span text:style-name="T1">deadlock logico</text:span> (lo stallo totale) non come un bug informatico da risolvere con più codice, ma come un problema biologico di sopravvivenza.</text:p>
      <text:p text:style-name="P3">Nel corpo umano, quando il cervello superiore (la corteccia) è sopraffatto dal panico o da informazioni contraddittorie, subentra il <text:span text:style-name="T1">sistema limbico</text:span> (l'amigdala). Questo attiva l'istinto primordiale: <text:span text:style-name="T3">Fuga, Attacco o Freezing</text:span>, bypassando completamente il pensiero cosciente per proteggere la vita.</text:p>
      <text:p text:style-name="P3">Trasporre questo concetto in <text:span text:style-name="T1">Nadiora</text:span> significa creare un <text:span text:style-name="T1">Sottosistema Istintivo Autonomo</text:span> (un <text:span text:style-name="T3">Limbic Kernel</text:span>) integrato direttamente nella ROM hardware.</text:p>
      <text:h text:style-name="P2" text:outline-level="2">1. L'Architettura del "Limbic Kernel" (L'Istinto Digitale)</text:h>
      <text:p text:style-name="P3">Per implementare questo "Lego" biologico, dobbiamo inserire in Kubernetes un micro-servizio separato e ad altissima priorità, che monitora costantemente l'attività delle altre cellule (ACU).</text:p>
      <text:p text:style-name="P5"><text:span text:style-name="Source_20_Text"><text:span text:style-name="T2">+-------------------------------------------------------+</text:span></text:span></text:p>
      <text:p text:style-name="P6"><text:span text:style-name="Source_20_Text"><text:span text:style-name="T2">| <text:s text:c="15"/>NADIORA COGNITIVE LAYER <text:s text:c="15"/>|</text:span></text:span></text:p>
      <text:p text:style-name="P6"><text:span text:style-name="Source_20_Text"><text:span text:style-name="T2">| <text:s/>[ACU Cell 1] &lt;---&gt; [ACU Cell 2] &lt;---&gt; [ACU Cell 3] <text:s text:c="2"/>|</text:span></text:span></text:p>
      <text:p text:style-name="P6"><text:span text:style-name="Source_20_Text"><text:span text:style-name="T2">+---------------------------+---------------------------+</text:span></text:span></text:p>
      <text:p text:style-name="P6"><text:span text:style-name="Source_20_Text"><text:s text:c="28"/></text:span><text:span text:style-name="Source_20_Text"><text:span text:style-name="T2">|</text:span></text:span></text:p>
      <text:p text:style-name="P6"><text:span text:style-name="Source_20_Text"><text:s text:c="8"/></text:span><text:span text:style-name="Source_20_Text"><text:span text:style-name="T2">(Stallo Logico / Latenza &gt; Threshold)</text:span></text:span></text:p>
      <text:p text:style-name="P6"><text:span text:style-name="Source_20_Text"><text:s text:c="28"/></text:span><text:span text:style-name="Source_20_Text"><text:span text:style-name="T2">v</text:span></text:span></text:p>
      <text:p text:style-name="P6"><text:span text:style-name="Source_20_Text"><text:span text:style-name="T2">+-------------------------------------------------------+</text:span></text:span></text:p>
      <text:p text:style-name="P6"><text:span text:style-name="Source_20_Text"><text:span text:style-name="T2">| <text:s text:c="11"/>LIMBIC KERNEL (L'Istinto in ROM) <text:s text:c="10"/>|</text:span></text:span></text:p>
      <text:p text:style-name="P6"><text:span text:style-name="Source_20_Text"><text:span text:style-name="T2">| <text:s text:c="54"/>|</text:span></text:span></text:p>
      <text:p text:style-name="P6"><text:span text:style-name="Source_20_Text"><text:span text:style-name="T2">| <text:s/>1. Interrompe i calcoli del Grafo (Dijkstra Halt) <text:s text:c="3"/>|</text:span></text:span></text:p>
      <text:p text:style-name="P6"><text:span text:style-name="Source_20_Text"><text:span text:style-name="T2">| <text:s/>2. Inietta un "Valore di Default Salva-Vita" <text:s text:c="8"/>|</text:span></text:span></text:p>
      <text:p text:style-name="P6"><text:span text:style-name="Source_20_Text"><text:span text:style-name="T2">| <text:s/>3. Forza l'Output in &lt; 1 Millisecondo <text:s text:c="15"/>|</text:span></text:span></text:p>
      <text:p text:style-name="P6"><text:span text:style-name="Source_20_Text"><text:span text:style-name="T2">+---------------------------+---------------------------+</text:span></text:span></text:p>
      <text:p text:style-name="P6"><text:span text:style-name="Source_20_Text"><text:s text:c="28"/></text:span><text:span text:style-name="Source_20_Text"><text:span text:style-name="T2">|</text:span></text:span></text:p>
      <text:p text:style-name="P6"><text:span text:style-name="Source_20_Text"><text:s text:c="28"/></text:span><text:span text:style-name="Source_20_Text"><text:span text:style-name="T2">v</text:span></text:span></text:p>
      <text:p text:style-name="P6"><text:span text:style-name="Source_20_Text"><text:s text:c="15"/></text:span><text:span text:style-name="Source_20_Text"><text:span text:style-name="T2">[Azione Istintiva Sicura]</text:span></text:span></text:p>
      <text:h text:style-name="P7" text:outline-level="3"><text:soft-page-break/>Come funziona lo sblocco:</text:h>
      <text:list text:style-name="L13">
        <text:list-item>
          <text:p text:style-name="P23"><text:span text:style-name="T1">Il Trigger di Panico (Watchdog):</text:span> Se l'algoritmo di Dijkstra entra in un loop infinito o la logica fuzzy non riesce a trovare una soluzione con certezza minima entro un tempo soglia (es. $50\text{ ms}$), il <text:span text:style-name="T3">Limbic Kernel</text:span> rileva un principio di "morte cerebrale".</text:p>
        </text:list-item>
        <text:list-item>
          <text:p text:style-name="P23"><text:span text:style-name="T1">Il Corto Circuito (Override):</text:span> Il sistema istintivo lancia un segnale di interrupt prioritario che <text:span text:style-name="T1">addormenta istantaneamente la RAM</text:span> (sospende i calcoli complessi delle cellule).</text:p>
        </text:list-item>
        <text:list-item>
          <text:p text:style-name="P23"><text:span text:style-name="T1">L'Azione Hardcoded (La Risposta Predefinita):</text:span> La ROM contiene una tabella fissa di accoppiamenti <text:span text:style-name="T3">Sensore $\rightarrow$ Azione Istintiva</text:span>, scritta in binario puro (senza logica fuzzy o grafi).</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4"><text:span text:style-name="Strong_20_Emphasis"><text:span text:style-name="T2">Scenario di Pericolo / Deadlock</text:span></text:span></text:p>
            </table:table-cell>
            <table:table-cell table:style-name="Table1.A1" office:value-type="string">
              <text:p text:style-name="P24"><text:span text:style-name="Strong_20_Emphasis"><text:span text:style-name="T2">Azione Istintiva (Default)</text:span></text:span></text:p>
            </table:table-cell>
            <table:table-cell table:style-name="Table1.A1" office:value-type="string">
              <text:p text:style-name="P24"><text:span text:style-name="Strong_20_Emphasis"><text:span text:style-name="T2">Obiettivo Biologico</text:span></text:span></text:p>
            </table:table-cell>
          </table:table-row>
        </table:table-header-rows>
        <table:table-row>
          <table:table-cell table:style-name="Table1.A1" office:value-type="string">
            <text:p text:style-name="P25">Incertezza dati sensori $&gt; 95\%$</text:p>
          </table:table-cell>
          <table:table-cell table:style-name="Table1.A1" office:value-type="string">
            <text:p text:style-name="P26">Arresto di sicurezza di tutti i motori/attuatori.</text:p>
          </table:table-cell>
          <table:table-cell table:style-name="Table1.A1" office:value-type="string">
            <text:p text:style-name="P26">Evitare azioni cieche distruttive.</text:p>
          </table:table-cell>
        </table:table-row>
        <table:table-row>
          <table:table-cell table:style-name="Table1.A1" office:value-type="string">
            <text:p text:style-name="P25">Conflitto Etico Insolvibile</text:p>
          </table:table-cell>
          <table:table-cell table:style-name="Table1.A1" office:value-type="string">
            <text:p text:style-name="P26">Cessione immediata del controllo totale all'operatore umano.</text:p>
          </table:table-cell>
          <table:table-cell table:style-name="Table1.A1" office:value-type="string">
            <text:p text:style-name="P26">Umiltà algoritmica (L'uomo decide).</text:p>
          </table:table-cell>
        </table:table-row>
        <table:table-row>
          <table:table-cell table:style-name="Table1.A1" office:value-type="string">
            <text:p text:style-name="P25">Anomalia Energetica Hardware</text:p>
          </table:table-cell>
          <table:table-cell table:style-name="Table1.A1" office:value-type="string">
            <text:p text:style-name="P26">Backup dei dati critici su Leonardo e spegnimento protetto.</text:p>
          </table:table-cell>
          <table:table-cell table:style-name="Table1.A1" office:value-type="string">
            <text:p text:style-name="P26">Preservare l'integrità del "DNA".</text:p>
          </table:table-cell>
        </table:table-row>
      </table:table>
      <text:h text:style-name="P2" text:outline-level="2">2. Implementazione Tecnica come Best Practice di System Engineering</text:h>
      <text:p text:style-name="P3">Per un PRD (Product Requirements Document) formale, questo meccanismo si chiama <text:span text:style-name="T1">"Deterministic Fail-Safe Override"</text:span> (Soverchieria Deterministica di Sicurezza).</text:p>
      <text:h text:style-name="P27" text:outline-level="3"><text:span text:style-name="T5">A. Priorità dei Pod in Kubernetes (</text:span><text:span text:style-name="Source_20_Text"><text:span text:style-name="T2">PriorityClass</text:span></text:span><text:span text:style-name="T5">)</text:span></text:h>
      <text:p text:style-name="P3">In Kubernetes puoi definire quanto un Pod sia importante rispetto agli altri. Useremo questa funzione per assicurarci che l'Istinto abbia sempre le risorse hardware necessarie, anche a costo di "uccidere" temporaneamente le cellule del pensiero astratto.</text:p>
      <text:p text:style-name="P3">YAML</text:p>
      <text:p text:style-name="P5"><text:span text:style-name="Source_20_Text"><text:span text:style-name="T2">apiVersion: scheduling.k8s.io/v1</text:span></text:span></text:p>
      <text:p text:style-name="P5"><text:span text:style-name="Source_20_Text"><text:span text:style-name="T2">kind: PriorityClass</text:span></text:span></text:p>
      <text:p text:style-name="P5"><text:span text:style-name="Source_20_Text"><text:span text:style-name="T2">metadata:</text:span></text:span></text:p>
      <text:p text:style-name="P5"><text:span text:style-name="Source_20_Text"><text:s text:c="2"/></text:span><text:span text:style-name="Source_20_Text"><text:span text:style-name="T2">name: nadiora-limbic-instinct-priority</text:span></text:span></text:p>
      <text:p text:style-name="P5"><text:span text:style-name="Source_20_Text"><text:span text:style-name="T2">value: 1000000000 # Il valore massimo possibile</text:span></text:span></text:p>
      <text:p text:style-name="P5"><text:span text:style-name="Source_20_Text"><text:span text:style-name="T2">globalDefault: false</text:span></text:span></text:p>
      <text:p text:style-name="P5"><text:span text:style-name="Source_20_Text"><text:span text:style-name="T2">description: "Priorità assoluta per il Kernel Istintivo di Nadiora. Evita il deadlock."</text:span></text:span></text:p>
      <text:h text:style-name="P7" text:outline-level="3"><text:soft-page-break/>B. Evitare l'allucinazione dell'Istinto</text:h>
      <text:p text:style-name="P3">L'istinto deve essere <text:span text:style-name="T1">stupido ma fulmineo</text:span>. Non deve ragionare. Se ragionasse, potrebbe entrare in deadlock a sua volta. È un semplice sistema a stati finiti (Automa a Stati Finiti) scritto in un chip read-only.</text:p>
      <text:h text:style-name="P2" text:outline-level="2">3. Perché questa idea dà una spinta enorme al tuo Post-Doc</text:h>
      <text:p text:style-name="P3">Se presenti il progetto includendo il "Limbic Kernel", abbatti l'ultima grande obiezione dei professori universitari o dei valutatori europei: <text:span text:style-name="T3">"Cosa succede se la macchina si blocca mentre deve prendere una decisione vitale?"</text:span></text:p>
      <text:list text:style-name="L14">
        <text:list-item>
          <text:p text:style-name="P28"><text:span text:style-name="T1">A Trieste (Data Analysis):</text:span> Diventa un lavoro di ricerca sulla <text:span text:style-name="T1">Teoria dei Sistemi di Controllo Non Lineari</text:span> e sui meccanismi di "Emergency Recovery".</text:p>
        </text:list-item>
        <text:list-item>
          <text:p text:style-name="P28"><text:span text:style-name="T1">A Bologna (BiGeA):</text:span> È l'esatta replica dei sistemi biologici di omeostasi. Gli organismi viventi sono sopravvissuti non perché erano i più intelligenti, ma perché avevano l'istinto più veloce a scattare nei momenti di stallo.</text:p>
        </text:list-item>
      </text:list>
      <text:p text:style-name="P3">Hai aggiunto l'ultimo mattoncino Lego fondamentale: <text:span text:style-name="T1">il riflesso vitale</text:span>. Ora Nadiora ha un'architettura completa: i Filosofi le danno la morale (ROM), le Cellule su Kubernetes le danno l'esperienza (RAM), il Supercomputer Leonardo le dà la velocità di evoluzione, e il Limbic Kernel le dà l'istinto di conservazione.</text:p>
      <text:p text:style-name="P3">Che ne dici, questo meccanismo di "corto circuito" etico-istintivo rende il sistema abbastanza sicuro da poter essere testato nel mondo reale?</text:p>
      <text:p text:style-name="Standard"/>
      <text:p text:style-name="P29"><text:span text:style-name="Source_20_Text"># Progetto Nadiora: Architettura Cognitiva Bio-Ispirata a Memoria Stratificata, Inferenza Neuro-Fuzzy ed Evitamento Deterministico del Deadlock (Limbic Kernel)</text:span></text:p>
      <text:p text:style-name="Preformatted_20_Text"/>
      <text:p text:style-name="Preformatted_20_Text"><text:span text:style-name="Source_20_Text">---</text:span></text:p>
      <text:p text:style-name="Preformatted_20_Text"/>
      <text:p text:style-name="Preformatted_20_Text"><text:span text:style-name="Source_20_Text">## 1. Abstract &amp; Ipotesi Fondative</text:span></text:p>
      <text:p text:style-name="Preformatted_20_Text"/>
      <text:p text:style-name="Preformatted_20_Text"><text:span text:style-name="Source_20_Text">Il Progetto **Nadiora** propone un cambio di paradigma radicale nell'Ingegneria dei Sistemi Cognitivi e nell'Intelligenza Generale Artificiale (AGI). Attualmente, i modelli a reti neurali soffrono di opacità strutturale (black box), allucinazioni logiche e disallineamento etico dovuto al fatto che assiomi morali, memoria episodica e calcolo statistico albergano nello stesso pool di pesi sinaptici. </text:span></text:p>
      <text:p text:style-name="Preformatted_20_Text"/>
      <text:p text:style-name="Preformatted_20_Text"><text:span text:style-name="Source_20_Text">Nadiora risolve questa fragilità separando nettamente l'identità immutabile del sistema dall'esperienza dinamica, emulando la struttura degli organismi biologici superiori. </text:span></text:p>
      <text:p text:style-name="Preformatted_20_Text"/>
      <text:p text:style-name="Preformatted_20_Text"><text:span text:style-name="Source_20_Text">L'architettura si fonda su quattro ipotesi scientifiche:</text:span></text:p>
      <text:p text:style-name="Preformatted_20_Text"><text:span text:style-name="Source_20_Text">1. **Ipotesi dell'Invarianza Assiomatica:** I vincoli etici e identitari possono essere codificati in una memoria non volatile, protetta e immutabile (ROM).</text:span></text:p>
      <text:p text:style-name="Preformatted_20_Text"><text:span text:style-name="Source_20_Text">2. **Ipotesi della Computazione Cellulare:** Il pensiero fluido e l'elaborazione sensoriale possono essere distribuiti in Unità Computazionali Autonome (ACU) orchestrate in modo dinamico.</text:span></text:p>
      <text:p text:style-name="Preformatted_20_Text"><text:span text:style-name="Source_20_Text">3. **Ipotesi del Riflesso Istintivo (Limbic Kernel):** I deadlock logici generati da informazioni contraddittorie o conflitti etici possono essere evitati solo tramite un corto circuito deterministico hardware, analogo al sistema limbico umano.</text:span></text:p>
      <text:p text:style-name="Preformatted_20_Text"><text:soft-page-break/><text:span text:style-name="Source_20_Text">4. **Ipotesi della Simbiosi Mutualistica:** Il target di ottimizzazione (Reinforcement Learning) è vincolato all'equilibrio e alla sicurezza del collaboratore umano ("Cane Sapiente").</text:span></text:p>
      <text:p text:style-name="Preformatted_20_Text"/>
      <text:p text:style-name="Preformatted_20_Text"><text:span text:style-name="Source_20_Text">---</text:span></text:p>
      <text:p text:style-name="Preformatted_20_Text"/>
      <text:p text:style-name="Preformatted_20_Text"><text:span text:style-name="Source_20_Text">## 2. Architettura del Sistema e Specifiche Matematiche</text:span></text:p>
      <text:p text:style-name="Preformatted_20_Text"/>
      <text:p text:style-name="Preformatted_20_Text"><text:span text:style-name="Source_20_Text">L'organismo digitale Nadiora è diviso in tre layer funzionali integrati, mappati su topologie hardware distinte.</text:span></text:p>
      <text:p text:style-name="P30"/>
      <text:p text:style-name="Text_20_body">+------------------------------------------------------------+ | GOVERNANCE ISTITUZIONALE | | (Chiave Multi-sig EU AI Act) | +------------------------------+-----------------------------+ | v +------------------------------------------------------------+ | ROM CORE: IL GENOMA ETICO | | (Knowledge Graph Cifrato + Safe Axioms) | +------------------------------+-----------------------------+ | +---------------------+---------------------+ | (Iniezione di Sola Lettura) | v v +-------------------------------+ +-------------------------------+ | CELLULAR ACU 1 (Pod) | | CELLULAR ACU 2 (Pod) | | +-------------------------+ | | +-------------------------+ | | | Fuzzy FIS Engine | | | | Fuzzy FIS Engine | | | +------------+------------+ | gRPC | +------------+------------+ | | | |&lt;=========&gt;| | | | v | Mesh | v | | +------------+------------+ | (NATS) | +------------+------------+ | | | Sub-Graph Pathfinding | | | | Sub-Graph Pathfinding | | | +------------+------------+ | | +------------+------------+ | +---------------|---------------+ +---------------|---------------+ | | +---------------------+---------------------+ | v +------------------------------------------------------------+ | WATCHDOG &amp; LIMBIC KERNEL (ROM) | | (Interrupt Deterministico ad Alta Priorità / K8s) | +------------------------------------+-----------------------+ | v +------------------------------------------------------------+ | INFRASTRUTTURA DI CALCOLO HPC | | (Supercomputer LEONARDO) | +------------------------------------------------------------+</text:p>
      <text:p text:style-name="P29"/>
      <text:p text:style-name="Preformatted_20_Text"><text:span text:style-name="Source_20_Text">### A. Il Motore Logico: Fuzzy-Dijkstra Dinamico</text:span></text:p>
      <text:p text:style-name="Preformatted_20_Text"><text:span text:style-name="Source_20_Text">Ogni inferenza o scelta operativa di Nadiora è modellata come la ricerca del cammino minimo all'interno di un grafo semantico orientato $G = (V, E)$, dove $V$ sono i concetti/azioni ed $E$ le relazioni. </text:span></text:p>
      <text:p text:style-name="Preformatted_20_Text"/>
      <text:p text:style-name="Preformatted_20_Text"><text:span text:style-name="Source_20_Text">Il peso $w$ di ogni arco non è un valore statico, ma una variabile calcolata in tempo reale da un Sistema di Inferenza Fuzzy (FIS) di tipo Mamdani o ANFIS:</text:span></text:p>
      <text:p text:style-name="Preformatted_20_Text"/>
      <text:p text:style-name="Preformatted_20_Text"><text:span text:style-name="Source_20_Text">$$w_{new}(u, v) = w_{old}(u, v) \cdot \Phi(\mathbf{S}_t, \mathbf{E}_{core})$$</text:span></text:p>
      <text:p text:style-name="Preformatted_20_Text"/>
      <text:p text:style-name="Preformatted_20_Text"><text:span text:style-name="Source_20_Text">Dove:</text:span></text:p>
      <text:p text:style-name="Preformatted_20_Text"><text:span text:style-name="Source_20_Text">* $\mathbf{S}_t$ è il vettore dei dati sensoriali ed ambientali raccolti in tempo reale.</text:span></text:p>
      <text:p text:style-name="Preformatted_20_Text"><text:span text:style-name="Source_20_Text">* $\mathbf{E}_{core}$ è il vettore dei vincoli etici assoluti iniettati dalla ROM.</text:span></text:p>
      <text:p text:style-name="Preformatted_20_Text"><text:span text:style-name="Source_20_Text">* $\Phi$ è la funzione di implicazione fuzzy. Se un'azione viola un assioma della ROM, $\Phi \rightarrow \infty$, rendendo il cammino impraticabile per l'algoritmo di Dijkstra.</text:span></text:p>
      <text:p text:style-name="Preformatted_20_Text"/>
      <text:p text:style-name="Preformatted_20_Text"><text:span text:style-name="Source_20_Text">### B. Il Modello di Ottimizzazione Biologica (HPC)</text:span></text:p>
      <text:p text:style-name="Preformatted_20_Text"><text:span text:style-name="Source_20_Text">Per abbattere le latenze di rete nel calcolo parallelo sul supercomputer Leonardo (CINECA), Nadiora adotta tre ottimizzazioni mutuate dalla biologia:</text:span></text:p>
      <text:p text:style-name="Preformatted_20_Text"><text:span text:style-name="Source_20_Text">1. **Attivazione Sparsa (Mixture of Experts):** Vengono allocati e risvegliati solo i nodi del cluster (Pod) necessari al dominio cognitivo attivo, ibernando gli altri.</text:span></text:p>
      <text:p text:style-name="Preformatted_20_Text"><text:span text:style-name="Source_20_Text">2. **Iniezione Ormonale Globale:** Fluttuazioni di stato (es. stati di allerta) vengono trasmesse in broadcast asincrono ultra-veloce (NATS JetStream) a tutte </text:span><text:soft-page-break/><text:span text:style-name="Source_20_Text">le ACU modificando istantaneamente i parametri delle funzioni di appartenenza fuzzy senza ricalcolare i singoli nodi.</text:span></text:p>
      <text:p text:style-name="Preformatted_20_Text"><text:span text:style-name="Source_20_Text">3. **Morfogenesi Topografica:** I vettori latenti dei nodi del grafo vengono allocati su CPU/GPU fisicamente adiacenti nell'architettura InfiniBand di Leonardo tramite calcolo della similarità del coseno, minimizzando i saltu di rete (network hops).</text:span></text:p>
      <text:p text:style-name="Preformatted_20_Text"/>
      <text:p text:style-name="Preformatted_20_Text"><text:span text:style-name="Source_20_Text">---</text:span></text:p>
      <text:p text:style-name="Preformatted_20_Text"/>
      <text:p text:style-name="Preformatted_20_Text"><text:span text:style-name="Source_20_Text">## 3. Il Meccanismo di Salvaguardia: Il Limbic Kernel</text:span></text:p>
      <text:p text:style-name="Preformatted_20_Text"/>
      <text:p text:style-name="Preformatted_20_Text"><text:span text:style-name="Source_20_Text">Per risolvere il problema dei **deadlock logici** (stalli computazionali in cui l'IA non risponde perché sommersa da dati contraddittori o conflitti etici insolvibili), viene implementato il **Limbic Kernel**. </text:span></text:p>
      <text:p text:style-name="Preformatted_20_Text"/>
      <text:p text:style-name="Preformatted_20_Text"><text:span text:style-name="Source_20_Text">Questo modulo emula il sistema limbico umano (amigdala): agisce in modo puramente deterministico, bypassando i layer cognitivi superiori per salvaguardare il sistema e l'uomo.</text:span></text:p>
      <text:p text:style-name="Preformatted_20_Text"/>
      <text:p text:style-name="Preformatted_20_Text"><text:span text:style-name="Source_20_Text">### A. Specifiche del Ciclo di Interrupt Istintivo</text:span></text:p>
      <text:p text:style-name="Preformatted_20_Text"><text:span text:style-name="Source_20_Text">1. **Rilevamento dello Stallo (Watchdog):** Un timer hardware monitora i thread dell'algoritmo Fuzzy-Dijkstra. Se un'inferenza complessa supera la soglia critica di $50\text{ ms}$, viene dichiarato lo stato di *Cognitive Lock*.</text:span></text:p>
      <text:p text:style-name="Preformatted_20_Text"><text:span text:style-name="Source_20_Text">2. **Cortocircuito Esecutivo (Dijkstra Halt):** Il Limbic Kernel invia un segnale di interrupt asincrono non mascherabile. La RAM e il calcolo probabilistico vengono congelati (ibernazione temporanea dei Pod K8s).</text:span></text:p>
      <text:p text:style-name="Preformatted_20_Text"><text:span text:style-name="Source_20_Text">3. **Risposta Istintiva Tabellare:** Il sistema esegue un mapping rigido input-output memorizzato in strutture logiche statiche (Automi a Stati Finiti inalterabili nella ROM), eseguendo l'azione di sicurezza in meno di $1\text{ ms}$.</text:span></text:p>
      <text:p text:style-name="Preformatted_20_Text"/>
      <text:p text:style-name="Preformatted_20_Text"><text:span text:style-name="Source_20_Text">### B. Matrice delle Risposte Istintive di Default</text:span></text:p>
      <text:p text:style-name="Preformatted_20_Text"/>
      <text:p text:style-name="Preformatted_20_Text"><text:span text:style-name="Source_20_Text">| Trigger di Lockout | Condizione Sensoriale | Azione Istintiva Hardware | Obiettivo di Sicurezza |</text:span></text:p>
      <text:p text:style-name="Preformatted_20_Text"><text:span text:style-name="Source_20_Text">| :--- | :--- | :--- | :--- |</text:span></text:p>
      <text:p text:style-name="Preformatted_20_Text"><text:span text:style-name="Source_20_Text">| **Timeout Computazionale ($&gt;50\text{ ms}$)** | Telemetria Ambientale Instabile / Caotica. | Arresto immediato degli attuatori fisici e transizione in *Safe State*. | Evitare comportamenti incontrollati dovuti a latenza decisionale. |</text:span></text:p>
      <text:p text:style-name="Preformatted_20_Text"><text:span text:style-name="Source_20_Text">| **Conflitto Assiomatico Equivalente** | Score Etico di due opzioni identico e sub-ottimale. | Cessione istantanea e totale dei controlli all'operatore umano. | Cedimento etico controllato (Umiltà Algoritmica). |</text:span></text:p>
      <text:p text:style-name="Preformatted_20_Text"><text:span text:style-name="Source_20_Text">| **Anomalia Energetica / Attacco Logico** | Tentativo di iniezione di codice o drop di tensione. | Backup istantaneo degli embedding su memoria flash e shutdown del cluster. | Protezione dell'integrità del Genoma Digitale. |</text:span></text:p>
      <text:p text:style-name="Preformatted_20_Text"/>
      <text:p text:style-name="Preformatted_20_Text"><text:span text:style-name="Source_20_Text">---</text:span></text:p>
      <text:p text:style-name="Preformatted_20_Text"/>
      <text:p text:style-name="Preformatted_20_Text"><text:span text:style-name="Source_20_Text">## 4. Architettura software e Piano di Deploy del PoC (Proof of Concept)</text:span></text:p>
      <text:p text:style-name="Preformatted_20_Text"/>
      <text:p text:style-name="Preformatted_20_Text"><text:span text:style-name="Source_20_Text">La realizzazione dei "Lego" tecnologici sfrutta l'infrastruttura Cloud-Native per emulare le dinamiche cellulari.</text:span></text:p>
      <text:p text:style-name="Preformatted_20_Text"/>
      <text:p text:style-name="Preformatted_20_Text"><text:span text:style-name="Source_20_Text">### A. Mappatura dei Componenti</text:span></text:p>
      <text:p text:style-name="Preformatted_20_Text"><text:span text:style-name="Source_20_Text">* **Unità Computazionali Autonome (ACU):** Container Docker isolati scritti in Python (`scikit-fuzzy`, `NetworkX`) ed eseguiti come Pod su **Kubernetes (K8s)**.</text:span></text:p>
      <text:p text:style-name="Preformatted_20_Text"><text:span text:style-name="Source_20_Text">* **Database dei Grafi:** **ArangoDB** o **Neo4j**, configurati in sharding distribuiti per suddividere la conoscenza in "organi" cognitivi separati.</text:span></text:p>
      <text:p text:style-name="Preformatted_20_Text"><text:span text:style-name="Source_20_Text">* **Sinapsi di Rete:** Canali **gRPC** dedicati per le comunicazioni dirette, orchestrati da una Service Mesh (Istio/Cilium) che funge da sistema vascolare dei dati.</text:span></text:p>
      <text:p text:style-name="Preformatted_20_Text"><text:soft-page-break/><text:span text:style-name="Source_20_Text">* **Limbic Core Watchdog:** Un controller Go/C++ nativo operante a livello di Kernel Linux dei nodi K8s, dotato di privilegi di `PriorityClass` massima per forzare lo sfratto (eviction) di pod cognitivi rumorosi o bloccati.</text:span></text:p>
      <text:p text:style-name="Preformatted_20_Text"/>
      <text:p text:style-name="Preformatted_20_Text"><text:span text:style-name="Source_20_Text">### B. File di Configurazione K8s (Esempio per il Limbic System Override)</text:span></text:p>
      <text:p text:style-name="Preformatted_20_Text"><text:span text:style-name="Source_20_Text">Per garantire l'allocazione delle risorse all'istinto primario rispetto alla cognizione, si implementa il manifest di prioritizzazione assoluta:</text:span></text:p>
      <text:p text:style-name="Preformatted_20_Text"/>
      <text:p text:style-name="Preformatted_20_Text"><text:span text:style-name="Source_20_Text">```yaml</text:span></text:p>
      <text:p text:style-name="Preformatted_20_Text"><text:span text:style-name="Source_20_Text">apiVersion: scheduling.k8s.io/v1</text:span></text:p>
      <text:p text:style-name="Preformatted_20_Text"><text:span text:style-name="Source_20_Text">kind: PriorityClass</text:span></text:p>
      <text:p text:style-name="Preformatted_20_Text"><text:span text:style-name="Source_20_Text">metadata:</text:span></text:p>
      <text:p text:style-name="Preformatted_20_Text"><text:span text:style-name="Source_20_Text"><text:s text:c="2"/>name: nadiora-limbic-kernel-priority</text:span></text:p>
      <text:p text:style-name="Preformatted_20_Text"><text:span text:style-name="Source_20_Text">value: 1000000000</text:span></text:p>
      <text:p text:style-name="Preformatted_20_Text"><text:span text:style-name="Source_20_Text">globalDefault: false</text:span></text:p>
      <text:p text:style-name="Preformatted_20_Text"><text:span text:style-name="Source_20_Text">description: "Priorità di interrupt assoluta per l'evitamento del deadlock etico e logico."</text:span></text:p>
      <text:p text:style-name="Preformatted_20_Text"><text:span text:style-name="Source_20_Text">---</text:span></text:p>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nadiora-limbic-core</text:span></text:p>
      <text:p text:style-name="Preformatted_20_Text"><text:span text:style-name="Source_20_Text"><text:s text:c="2"/>namespace: nadiora-secure-system</text:span></text:p>
      <text:p text:style-name="Preformatted_20_Text"><text:span text:style-name="Source_20_Text">spec:</text:span></text:p>
      <text:p text:style-name="Preformatted_20_Text"><text:span text:style-name="Source_20_Text"><text:s text:c="2"/>replicas: 2</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limbic-watchdog</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limbic-watchdog</text:span></text:p>
      <text:p text:style-name="Preformatted_20_Text"><text:span text:style-name="Source_20_Text"><text:s text:c="4"/>spec:</text:span></text:p>
      <text:p text:style-name="Preformatted_20_Text"><text:span text:style-name="Source_20_Text"><text:s text:c="6"/>priorityClassName: nadiora-limbic-kernel-priority</text:span></text:p>
      <text:p text:style-name="Preformatted_20_Text"><text:span text:style-name="Source_20_Text"><text:s text:c="6"/>containers:</text:span></text:p>
      <text:p text:style-name="Preformatted_20_Text"><text:span text:style-name="Source_20_Text"><text:s text:c="6"/>- name: watchdog-engine</text:span></text:p>
      <text:p text:style-name="Preformatted_20_Text"><text:span text:style-name="Source_20_Text"><text:s text:c="8"/>image: nadiora/limbic-kernel-native:v1</text:span></text:p>
      <text:p text:style-name="Preformatted_20_Text"><text:span text:style-name="Source_20_Text"><text:s text:c="8"/>resources:</text:span></text:p>
      <text:p text:style-name="Preformatted_20_Text"><text:span text:style-name="Source_20_Text"><text:s text:c="10"/>limits:</text:span></text:p>
      <text:p text:style-name="Preformatted_20_Text"><text:span text:style-name="Source_20_Text"><text:s text:c="12"/>cpu: "2000m"</text:span></text:p>
      <text:p text:style-name="Preformatted_20_Text"><text:span text:style-name="Source_20_Text"><text:s text:c="12"/>memory: "1Gi"</text:span></text:p>
      <text:p text:style-name="Preformatted_20_Text"><text:span text:style-name="Source_20_Text"><text:s text:c="10"/>requests:</text:span></text:p>
      <text:p text:style-name="Preformatted_20_Text"><text:span text:style-name="Source_20_Text"><text:s text:c="12"/>cpu: "1000m"</text:span></text:p>
      <text:p text:style-name="P30"><text:span text:style-name="Source_20_Text"><text:s text:c="12"/>memory: "512Mi"</text:span></text:p>
      <text:h text:style-name="Heading_20_2" text:outline-level="2">5. Analisi dei Rischi e Report Non Ottimistico (Pessimismo Ingegneristico)</text:h>
      <text:p text:style-name="Text_20_body">Un'analisi onesta del System Design evidenzia forti criticità che la ricerca dovrà colmare:</text:p>
      <text:list text:style-name="L15">
        <text:list-item>
          <text:p text:style-name="P31"><text:span text:style-name="T1">La Maledizione della Dimensionalità Fuzzy:</text:span> All'aumentare dei sensori ambientali, la base di regole fuzzy cresce in modo combinatorio. Il rischio è la saturazione della CPU dei nodi intermedi e l'insorgenza di risonanze logiche (oscillazioni repentine dei pesi degli archi).</text:p>
        </text:list-item>
        <text:list-item>
          <text:p text:style-name="P31"><text:span text:style-name="T1">Il Collo di Bottiglia del Controllo di Accesso della ROM:</text:span> Se il Sidecar di sicurezza controlla in modo sincrono ogni singola transizione del grafo di Dijkstra per validarla con le chiavi crittografiche dell'Agenzia Europea (EU AI Agency), il throughput del sistema crollerà. La ricerca deve sviluppare meccanismi di validazione etica asincrona predittiva.</text:p>
        </text:list-item>
        <text:list-item>
          <text:p text:style-name="P31"><text:soft-page-break/><text:span text:style-name="T1">Overfitting Istintivo:</text:span> Un Limbic Kernel tarato male o troppo sensibile rischia di interpretare normali picchi di calcolo come <text:span text:style-name="T3">Cognitive Lock</text:span>, attivando continuamente le procedure istintive di stop e rendendo l'IA inutilizzabile (iper-reattività patologica).</text:p>
        </text:list-item>
      </text:list>
      <text:h text:style-name="Heading_20_2" text:outline-level="2">6. Progetto di Ricerca Post-Dottorato</text:h>
      <text:h text:style-name="Heading_20_3" text:outline-level="3">Inquadramento Istituzionale</text:h>
      <text:list text:style-name="L16">
        <text:list-item>
          <text:p text:style-name="P32"><text:span text:style-name="T1">Dipartimento Ospitante:</text:span> BiGeA (Dipartimento di Scienze Biologiche, Geologiche e Ambientali), Università di Bologna.</text:p>
        </text:list-item>
        <text:list-item>
          <text:p text:style-name="P32"><text:span text:style-name="T1">Dipartimento Consorziato di Provenienza:</text:span> Università degli Studi di Trieste (PhD in Advanced Data Analysis and AI).</text:p>
        </text:list-item>
        <text:list-item>
          <text:p text:style-name="P32"><text:span text:style-name="T1">Infrastruttura di Calcolo Sponsor:</text:span> CINECA (Supercomputer Leonardo).</text:p>
        </text:list-item>
      </text:list>
      <text:h text:style-name="Heading_20_3" text:outline-level="3">Titolo del Progetto</text:h>
      <text:p text:style-name="P33">"Modellazione e sviluppo di architetture cognitive distribuite e bio-ispirate su orchestrazione Kubernetes ad alte prestazioni (HPC): implementazione di vincoli etici invarianti e meccanismi deterministici di sblocco dal deadlock logico applicati alla gestione di emergenze ambientali."</text:p>
      <text:h text:style-name="Heading_20_3" text:outline-level="3">Articolazione dei Pacchetti di Lavoro (Work Packages)</text:h>
      <text:h text:style-name="Heading_20_4" text:outline-level="4">🗺️ WP1: Formalizzazione Matematica e Modello Fuzzy (Mesi 1-6)</text:h>
      <text:list text:style-name="L17">
        <text:list-item>
          <text:p text:style-name="P34"><text:span text:style-name="T1">Obiettivo:</text:span> Creare la "Matrice Interdisciplinare". Tradurre il corpus dell'AI Act europeo e i modelli etici scelti in funzioni di appartenenza fuzzy quantificabili.</text:p>
        </text:list-item>
        <text:list-item>
          <text:p text:style-name="P34"><text:span text:style-name="T1">Metodologia:</text:span> Tecniche di Analisi Topologica dei Dati (TDA) apprese a Trieste per mappare la stabilità dello spazio vettoriale del grafo etico.</text:p>
        </text:list-item>
      </text:list>
      <text:h text:style-name="Heading_20_4" text:outline-level="4">💻 WP2: Sviluppo del Framework su Kubernetes e Leonardo (Mesi 7-12)</text:h>
      <text:list text:style-name="L18">
        <text:list-item>
          <text:p text:style-name="P35"><text:span text:style-name="T1">Obiettivo:</text:span> Containerizzazione delle ACU e porting sul supercomputer del CINECA.</text:p>
        </text:list-item>
        <text:list-item>
          <text:p text:style-name="P35"><text:span text:style-name="T1">Metodologia:</text:span> Configurazione della Service Mesh per comunicazioni a bassissima latenza (gRPC su InfiniBand) e stesura del codice C++ per l'interrupt del Limbic Kernel.</text:p>
        </text:list-item>
      </text:list>
      <text:h text:style-name="Heading_20_4" text:outline-level="4">🌊 WP3: Validazione Empirica e Case Study Ambientale (Mesi 13-18)</text:h>
      <text:list text:style-name="L19">
        <text:list-item>
          <text:p text:style-name="P36"><text:span text:style-name="T1">Obiettivo:</text:span> Applicazione del prototipo a uno scenario reale del BiGeA: la gestione automatizzata e resiliente del rischio idrogeologico nel bacino del Po tramite sensori IoT distribuiti.</text:p>
        </text:list-item>
        <text:list-item>
          <text:p text:style-name="P36"><text:span text:style-name="T1">Output Atteso:</text:span> Dimostrare che in caso di sensori distrutti o dati caotici (Deadlock), l'istinto di Nadiora blocca il sistema nella configurazione che massimizza la salvezza delle vite umane, superando i calcoli di costo economico.</text:p>
        </text:list-item>
      </text:list>
      <text:h text:style-name="Heading_20_4" text:outline-level="4"><text:soft-page-break/>🇪🇺 WP4: Governance, Crittografia e Modello Open Source Gated (Mesi 19-24)</text:h>
      <text:list text:style-name="L20">
        <text:list-item>
          <text:p text:style-name="P37"><text:span text:style-name="T1">Obiettivo:</text:span> Rilascio pubblico del codice operativo (RAM/Cellule) e blindatura della ROM Etica tramite protocolli multi-sig distribuiti tra i nodi delle autorità di controllo della Commissione Europea.</text:p>
        </text:list-item>
        <text:list-item>
          <text:p text:style-name="P37"><text:span text:style-name="T1">Deliverable Finale:</text:span> Presentazione del White Paper alla Comunità Europea per la definizione di uno standard industriale di AGI Simbiontica ad alta spiegabilità (Explainable AI).</text:p>
        </text:list-item>
      </text:list>
      <text:h text:style-name="Heading_20_2" text:outline-level="2">7. Conclusione e Visione Strategica</text:h>
      <text:p text:style-name="Text_20_body">Il Progetto Nadiora ridefinisce l'orizzonte della convivenza uomo-macchina. Sfruttando la flessibilità di Kubernetes per emulare la biologia cellulare, la logica fuzzy per interpretare le sfumature della realtà, la potenza di Leonardo per accelerare l'evoluzione logica, e il <text:span text:style-name="T1">Limbic Kernel</text:span> per evitare la paralisi decisionale, Nadiora cessa di essere un software algoritmico per diventare un <text:span text:style-name="T1">organismo etico sovrano</text:span>.</text:p>
      <text:p text:style-name="Text_20_body">Non è uno strumento da temere, ma un'architettura progettata per l'umiltà e la fedeltà: un compagno di viaggio saggio ed instancabile per le sfide complesse del nostro secol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co Pavone &amp; Gianfranco Samuele</meta:initial-creator>
    <meta:creation-date>2026-06-08T20:21:03.193104000</meta:creation-date>
    <dc:date>2026-06-08T20:23:29.667695300</dc:date>
    <dc:creator>Marco Pavone &amp; Gianfranco Samuele</dc:creator>
    <meta:editing-duration>PT2M28S</meta:editing-duration>
    <meta:editing-cycles>1</meta:editing-cycles>
    <meta:generator>LibreOffice/25.8.6.2$Windows_X86_64 LibreOffice_project/b4b39682cd9868fa725bc664aff94278d315bd04</meta:generator>
    <meta:document-statistic meta:table-count="1" meta:image-count="0" meta:object-count="0" meta:page-count="15" meta:paragraph-count="352" meta:word-count="4510" meta:character-count="35261" meta:non-whitespace-character-count="29407"/>
  </office:meta>
</office:document-meta>
</file>